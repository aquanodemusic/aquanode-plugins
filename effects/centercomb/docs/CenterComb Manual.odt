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D90000029D8CDC984A.png" manifest:media-type="image/png"/>
  <manifest:file-entry manifest:full-path="Pictures/1000000100000104000001E5E3A1B9D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quatico" svg:font-family="Aquatico" style:font-family-generic="modern" style:font-pitch="variable"/>
    <style:font-face style:name="Bahnschrift" svg:font-family="Bahnschrift"/>
    <style:font-face style:name="Bahnschrift1" svg:font-family="Bahnschrift" style:font-family-generic="swiss" style:font-pitch="variable"/>
    <style:font-face style:name="Bahnschrift2" svg:font-family="Bahnschrif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quatico" fo:font-size="32pt" officeooo:rsid="000c0540" officeooo:paragraph-rsid="000c0540" style:font-size-asian="32pt" style:font-size-complex="32pt"/>
    </style:style>
    <style:style style:name="P2" style:family="paragraph" style:parent-style-name="Standard">
      <style:text-properties style:font-name="Aquatico" fo:font-size="12pt" officeooo:rsid="0033d260" officeooo:paragraph-rsid="000c0540" style:font-size-asian="10.5pt" style:font-size-complex="12pt"/>
    </style:style>
    <style:style style:name="P3" style:family="paragraph">
      <style:paragraph-properties fo:text-align="center"/>
    </style:style>
    <style:style style:name="P4" style:family="paragraph" style:parent-style-name="Standard">
      <style:text-properties style:font-name="Aquatico" fo:font-size="12pt" officeooo:rsid="0033d260" officeooo:paragraph-rsid="0033d260" style:font-size-asian="10.5pt" style:font-size-complex="12pt"/>
    </style:style>
    <style:style style:name="P5" style:family="paragraph" style:parent-style-name="Text_20_body">
      <style:text-properties fo:color="#999999" loext:opacity="100%" style:font-name="Bahnschrift2" fo:font-size="9pt" fo:font-weight="bold" officeooo:rsid="00797948" officeooo:paragraph-rsid="00797948" style:font-size-asian="9pt" style:font-size-complex="9pt"/>
    </style:style>
    <style:style style:name="P6" style:family="paragraph" style:parent-style-name="Text_20_body">
      <style:text-properties fo:color="#999999" loext:opacity="100%" style:font-name="Bahnschrift1" fo:font-size="9pt" officeooo:rsid="0034ecce" officeooo:paragraph-rsid="0033d260" style:font-size-asian="9pt" style:font-size-complex="9pt"/>
    </style:style>
    <style:style style:name="P7" style:family="paragraph" style:parent-style-name="Text_20_body" style:list-style-name="L1">
      <style:paragraph-properties fo:margin-left="0cm" fo:margin-right="0cm" fo:text-indent="0cm" style:auto-text-indent="false"/>
      <style:text-properties fo:color="#999999" loext:opacity="100%" style:font-name="Bahnschrift2" fo:font-size="9pt" officeooo:rsid="0034ecce" style:font-size-asian="9pt" style:font-size-complex="9pt"/>
    </style:style>
    <style:style style:name="P8" style:family="paragraph" style:parent-style-name="Text_20_body" style:list-style-name="L1">
      <style:paragraph-properties fo:margin-left="0cm" fo:margin-right="0cm" fo:text-indent="0cm" style:auto-text-indent="false"/>
      <style:text-properties fo:color="#999999" loext:opacity="100%" style:font-name="Bahnschrift1" fo:font-size="9pt" officeooo:rsid="0034ecce" style:font-size-asian="9pt" style:font-size-complex="9pt"/>
    </style:style>
    <style:style style:name="P9" style:family="paragraph" style:parent-style-name="Standard">
      <style:paragraph-properties fo:break-before="page"/>
      <style:text-properties style:font-name="Bahnschrift1" fo:font-size="12pt" officeooo:rsid="000d0e80" officeooo:paragraph-rsid="000d0e80" style:font-size-asian="10.5pt" style:font-size-complex="12pt"/>
    </style:style>
    <style:style style:name="P10" style:family="paragraph" style:parent-style-name="Standard">
      <style:text-properties style:font-name="Bahnschrift1" fo:font-size="12pt" officeooo:rsid="000d0e80" officeooo:paragraph-rsid="000d0e80" style:font-size-asian="10.5pt" style:font-size-complex="12pt"/>
    </style:style>
    <style:style style:name="P11" style:family="paragraph" style:parent-style-name="Standard">
      <style:text-properties officeooo:paragraph-rsid="000d0e80"/>
    </style:style>
    <style:style style:name="P12" style:family="paragraph" style:parent-style-name="Standard">
      <style:text-properties style:font-name="Bahnschrift" officeooo:paragraph-rsid="000d0e80"/>
    </style:style>
    <style:style style:name="P13" style:family="paragraph" style:parent-style-name="Standard">
      <style:text-properties style:font-name="Bahnschrift" officeooo:rsid="002d892b" officeooo:paragraph-rsid="002d892b"/>
    </style:style>
    <style:style style:name="P14" style:family="paragraph" style:parent-style-name="Standard">
      <style:text-properties style:font-name="Aquatico" fo:font-size="18pt" style:text-underline-style="solid" style:text-underline-width="auto" style:text-underline-color="font-color" officeooo:rsid="0012032a" officeooo:paragraph-rsid="0069c054" style:font-size-asian="18pt" style:font-size-complex="18pt"/>
    </style:style>
    <style:style style:name="P15" style:family="paragraph" style:parent-style-name="Text_20_body" style:list-style-name="L2">
      <style:text-properties style:font-name="Bahnschrift1" officeooo:rsid="0069c054" officeooo:paragraph-rsid="007520f2"/>
    </style:style>
    <style:style style:name="P16" style:family="paragraph" style:parent-style-name="Standard" style:list-style-name="L2">
      <style:text-properties officeooo:paragraph-rsid="0069c054"/>
    </style:style>
    <style:style style:name="P17" style:family="paragraph" style:parent-style-name="Standard" style:list-style-name="L2">
      <style:text-properties style:font-name="Bahnschrift1" officeooo:rsid="0069c054" officeooo:paragraph-rsid="0069c054"/>
    </style:style>
    <style:style style:name="P18" style:family="paragraph" style:parent-style-name="Standard">
      <style:text-properties style:font-name="Bahnschrift1" fo:font-style="normal" officeooo:rsid="0069c054" officeooo:paragraph-rsid="0069c054" style:font-style-asian="normal" style:font-style-complex="normal"/>
    </style:style>
    <style:style style:name="P19" style:family="paragraph" style:parent-style-name="Standard">
      <style:text-properties style:font-name="Bahnschrift1" fo:font-style="normal" officeooo:rsid="005cba2a" officeooo:paragraph-rsid="005cba2a" style:font-style-asian="normal" style:font-style-complex="normal"/>
    </style:style>
    <style:style style:name="P20" style:family="paragraph" style:parent-style-name="Text_20_body">
      <style:text-properties style:font-name="Aquatico" fo:font-size="18pt" style:text-underline-style="solid" style:text-underline-width="auto" style:text-underline-color="font-color" officeooo:rsid="001fcb9b" officeooo:paragraph-rsid="005fc839" style:font-size-asian="18pt" style:font-size-complex="18pt"/>
    </style:style>
    <style:style style:name="P21" style:family="paragraph" style:parent-style-name="Standard">
      <style:text-properties style:font-name="Bahnschrift1" fo:font-size="12pt" style:text-underline-style="none" officeooo:rsid="001fcb9b" officeooo:paragraph-rsid="005fc839" style:font-size-asian="10.5pt" style:font-size-complex="12pt"/>
    </style:style>
    <style:style style:name="P22" style:family="paragraph" style:parent-style-name="Text_20_body">
      <style:text-properties style:font-name="Bahnschrift1" fo:font-size="12pt" officeooo:rsid="0025d022" officeooo:paragraph-rsid="005fc839" style:font-size-asian="12pt" style:font-size-complex="12pt"/>
    </style:style>
    <style:style style:name="P23" style:family="paragraph" style:parent-style-name="Text_20_body" style:list-style-name="L3">
      <style:text-properties style:font-name="Aquatico" officeooo:rsid="0012032a" officeooo:paragraph-rsid="005fc839"/>
    </style:style>
    <style:style style:name="P24" style:family="paragraph" style:parent-style-name="Text_20_body" style:list-style-name="L3">
      <style:text-properties style:font-name="Bahnschrift1" fo:font-size="12pt" officeooo:rsid="0012032a" officeooo:paragraph-rsid="005fc839" style:font-size-asian="12pt" style:font-size-complex="12pt"/>
    </style:style>
    <style:style style:name="P25" style:family="paragraph" style:parent-style-name="Text_20_body" style:list-style-name="L3">
      <style:text-properties style:font-name="Bahnschrift1" fo:font-size="12pt" officeooo:rsid="0023fca2" officeooo:paragraph-rsid="005fc839" style:font-size-asian="12pt" style:font-size-complex="12pt"/>
    </style:style>
    <style:style style:name="P26" style:family="paragraph" style:parent-style-name="Standard">
      <style:text-properties style:font-name="Aquatico" officeooo:rsid="0012032a" officeooo:paragraph-rsid="0012032a"/>
    </style:style>
    <style:style style:name="P27" style:family="paragraph" style:parent-style-name="Standard">
      <style:text-properties style:font-name="Aquatico" fo:font-size="18pt" fo:font-style="normal" style:text-underline-style="solid" style:text-underline-width="auto" style:text-underline-color="font-color" officeooo:rsid="0012032a" officeooo:paragraph-rsid="0012032a" style:font-size-asian="18pt" style:font-style-asian="normal" style:font-size-complex="18pt" style:font-style-complex="normal"/>
    </style:style>
    <style:style style:name="P28" style:family="paragraph" style:parent-style-name="Heading_20_3">
      <style:paragraph-properties fo:margin-top="0cm" fo:margin-bottom="0.247cm" style:contextual-spacing="false" fo:line-height="115%"/>
      <style:text-properties style:font-name="Bahnschrift" style:text-underline-style="solid" style:text-underline-width="auto" style:text-underline-color="font-color" officeooo:rsid="006b73e4" officeooo:paragraph-rsid="006b73e4"/>
    </style:style>
    <style:style style:name="P29" style:family="paragraph" style:parent-style-name="Standard">
      <style:text-properties style:font-name="Bahnschrift" officeooo:rsid="0012032a" officeooo:paragraph-rsid="0012032a"/>
    </style:style>
    <style:style style:name="P30" style:family="paragraph" style:parent-style-name="Heading_20_4">
      <style:paragraph-properties fo:margin-top="0cm" fo:margin-bottom="0.247cm" style:contextual-spacing="false" fo:line-height="115%"/>
      <style:text-properties style:font-name="Bahnschrift" officeooo:rsid="0012032a"/>
    </style:style>
    <style:style style:name="P31" style:family="paragraph" style:parent-style-name="Text_20_body">
      <style:text-properties style:font-name="Bahnschrift" officeooo:rsid="0012032a"/>
    </style:style>
    <style:style style:name="P32" style:family="paragraph" style:parent-style-name="Text_20_body" style:list-style-name="L4">
      <style:text-properties style:font-name="Bahnschrift" officeooo:rsid="0012032a"/>
    </style:style>
    <style:style style:name="P33" style:family="paragraph" style:parent-style-name="Heading_20_3">
      <style:paragraph-properties fo:margin-top="0cm" fo:margin-bottom="0.247cm" style:contextual-spacing="false" fo:line-height="115%"/>
      <style:text-properties style:font-name="Bahnschrift" style:text-underline-style="solid" style:text-underline-width="auto" style:text-underline-color="font-color" officeooo:rsid="0012032a"/>
    </style:style>
    <style:style style:name="P34" style:family="paragraph" style:parent-style-name="Text_20_body" style:list-style-name="L5">
      <style:text-properties style:font-name="Bahnschrift" officeooo:rsid="0012032a"/>
    </style:style>
    <style:style style:name="P35" style:family="paragraph" style:parent-style-name="Text_20_body" style:list-style-name="L6">
      <style:text-properties style:font-name="Bahnschrift" officeooo:rsid="0012032a"/>
    </style:style>
    <style:style style:name="P36" style:family="paragraph" style:parent-style-name="Text_20_body">
      <style:text-properties style:font-name="Bahnschrift" officeooo:rsid="00767479" officeooo:paragraph-rsid="00767479"/>
    </style:style>
    <style:style style:name="P37" style:family="paragraph" style:parent-style-name="Text_20_body">
      <style:text-properties style:font-name="Bahnschrift" fo:font-weight="bold" officeooo:rsid="00767479" officeooo:paragraph-rsid="00767479" style:font-weight-asian="bold" style:font-weight-complex="bold"/>
    </style:style>
    <style:style style:name="P38" style:family="paragraph" style:parent-style-name="Text_20_body">
      <style:text-properties style:font-name="Bahnschrift" fo:font-weight="normal" officeooo:rsid="00767479" officeooo:paragraph-rsid="00767479" style:font-weight-asian="normal" style:font-weight-complex="normal"/>
    </style:style>
    <style:style style:name="P39" style:family="paragraph" style:parent-style-name="Text_20_body">
      <style:text-properties fo:color="#2a9cec" loext:opacity="100%" style:font-name="Bahnschrift1" fo:font-size="9pt" officeooo:rsid="002b4df7" officeooo:paragraph-rsid="002b4df7" style:font-size-asian="9pt" style:font-size-complex="9pt"/>
    </style:style>
    <style:style style:name="P40" style:family="paragraph" style:parent-style-name="Text_20_body">
      <style:text-properties fo:color="#2a9cec" loext:opacity="100%" style:font-name="Bahnschrift1" officeooo:rsid="002971c9" officeooo:paragraph-rsid="002971c9"/>
    </style:style>
    <style:style style:name="T1" style:family="text">
      <style:text-properties officeooo:rsid="00681e90"/>
    </style:style>
    <style:style style:name="T2" style:family="text">
      <style:text-properties fo:color="#2a9cec" loext:opacity="100%"/>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9pt" fo:font-style="italic" fo:font-weight="bold" officeooo:rsid="00643adb" style:font-size-asian="9pt" style:font-style-asian="italic" style:font-weight-asian="bold" style:font-size-complex="9pt" style:font-style-complex="italic" style:font-weight-complex="bold"/>
    </style:style>
    <style:style style:name="T5" style:family="text">
      <style:text-properties fo:font-size="9pt" style:font-size-asian="9pt" style:font-size-complex="9pt"/>
    </style:style>
    <style:style style:name="T6" style:family="text">
      <style:text-properties fo:color="#2a9cec" loext:opacity="100%" fo:font-family="'Conthrax Sb'" style:font-family-generic="swiss" style:font-pitch="variable"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fo:color="#2a9cec" loext:opacity="100%" fo:font-family="'Conthrax Sb'" style:font-family-generic="swiss" style:font-pitch="variable" fo:font-size="12pt" fo:font-style="normal" fo:font-weight="normal" officeooo:rsid="0032f932" style:font-size-asian="10.5pt" style:font-style-asian="normal" style:font-weight-asian="normal" style:font-size-complex="12pt" style:font-style-complex="normal" style:font-weight-complex="normal"/>
    </style:style>
    <style:style style:name="T8" style:family="text">
      <style:text-properties officeooo:rsid="007a7f30"/>
    </style:style>
    <style:style style:name="T9" style:family="text">
      <style:text-properties style:font-name="Bahnschrift2" fo:font-weight="bold"/>
    </style:style>
    <style:style style:name="T10" style:family="text">
      <style:text-properties style:font-name="Bahnschrift2"/>
    </style:style>
    <style:style style:name="T11" style:family="text">
      <style:text-properties fo:font-weight="bold"/>
    </style:style>
    <style:style style:name="T12" style:family="text">
      <style:text-properties fo:font-weight="normal"/>
    </style:style>
    <style:style style:name="T13" style:family="text">
      <style:text-properties fo:font-weight="bold" style:font-weight-asian="bold" style:font-weight-complex="bold"/>
    </style:style>
    <style:style style:name="T14" style:family="text">
      <style:text-properties fo:font-weight="normal" officeooo:rsid="007c7174"/>
    </style:style>
    <style:style style:name="T15" style:family="text">
      <style:text-properties style:font-name="Bahnschrift2" fo:font-weight="normal"/>
    </style:style>
    <style:style style:name="T16" style:family="text">
      <style:text-properties officeooo:rsid="000f5226"/>
    </style:style>
    <style:style style:name="T17" style:family="text">
      <style:text-properties officeooo:rsid="0069c054"/>
    </style:style>
    <style:style style:name="T18" style:family="text">
      <style:text-properties officeooo:rsid="000fcc38"/>
    </style:style>
    <style:style style:name="T19" style:family="text">
      <style:text-properties style:font-name="Bahnschrift" fo:font-size="12pt" officeooo:rsid="000d0e80" style:font-size-asian="10.5pt" style:font-size-complex="12pt"/>
    </style:style>
    <style:style style:name="T20" style:family="text">
      <style:text-properties style:font-name="Bahnschrift" fo:font-size="12pt" officeooo:rsid="0069c054" style:font-size-asian="10.5pt" style:font-size-complex="12pt"/>
    </style:style>
    <style:style style:name="T21" style:family="text">
      <style:text-properties style:font-name="Bahnschrift" fo:font-size="12pt" officeooo:rsid="000f5226" style:font-size-asian="10.5pt" style:font-size-complex="12pt"/>
    </style:style>
    <style:style style:name="T22" style:family="text">
      <style:text-properties style:font-name="Bahnschrift1" fo:font-size="12pt" officeooo:rsid="000f5226" style:font-size-asian="10.5pt" style:font-size-complex="12pt"/>
    </style:style>
    <style:style style:name="T23" style:family="text">
      <style:text-properties style:font-name="Bahnschrift1"/>
    </style:style>
    <style:style style:name="T24" style:family="text">
      <style:text-properties style:font-name="Bahnschrift1" fo:font-weight="normal" style:font-weight-asian="normal" style:font-weight-complex="normal"/>
    </style:style>
    <style:style style:name="T25" style:family="text">
      <style:text-properties style:font-name="Bahnschrift1" fo:font-weight="normal" officeooo:rsid="0069c054" style:font-weight-asian="normal" style:font-weight-complex="normal"/>
    </style:style>
    <style:style style:name="T26" style:family="text">
      <style:text-properties officeooo:rsid="004dba66"/>
    </style:style>
    <style:style style:name="T27" style:family="text">
      <style:text-properties style:font-name="Bahnschrift1" officeooo:rsid="0069c054"/>
    </style:style>
    <style:style style:name="T28" style:family="text">
      <style:text-properties officeooo:rsid="002ed70e"/>
    </style:style>
    <style:style style:name="T29" style:family="text">
      <style:text-properties fo:font-weight="bold" officeooo:rsid="002ed70e" style:font-weight-asian="bold" style:font-weight-complex="bold"/>
    </style:style>
    <style:style style:name="T30" style:family="text">
      <style:text-properties officeooo:rsid="0063d0eb"/>
    </style:style>
    <style:style style:name="T31" style:family="text">
      <style:text-properties style:text-underline-style="none"/>
    </style:style>
    <style:style style:name="T32" style:family="text">
      <style:text-properties officeooo:rsid="00651afd"/>
    </style:style>
    <style:style style:name="T33" style:family="text">
      <style:text-properties style:font-name="Bahnschrift1" fo:font-size="12pt" fo:font-weight="bold" style:font-size-asian="12pt" style:font-size-complex="12pt"/>
    </style:style>
    <style:style style:name="T34" style:family="text">
      <style:text-properties style:font-name="Bahnschrift1" fo:font-size="12pt" style:font-size-asian="12pt" style:font-size-complex="12pt"/>
    </style:style>
    <style:style style:name="T35" style:family="text">
      <style:text-properties style:font-name="Bahnschrift1" fo:font-size="12pt" officeooo:rsid="00235970" style:font-size-asian="12pt" style:font-size-complex="12pt"/>
    </style:style>
    <style:style style:name="T36" style:family="text">
      <style:text-properties style:font-name="Bahnschrift1" fo:font-size="12pt" officeooo:rsid="002ed70e" style:font-size-asian="12pt" style:font-size-complex="12pt"/>
    </style:style>
    <style:style style:name="T37" style:family="text">
      <style:text-properties officeooo:rsid="00235970"/>
    </style:style>
    <style:style style:name="T38" style:family="text">
      <style:text-properties officeooo:rsid="006d3426"/>
    </style:style>
    <style:style style:name="T39" style:family="text">
      <style:text-properties officeooo:rsid="0056bda3"/>
    </style:style>
    <style:style style:name="T40" style:family="text">
      <style:text-properties fo:font-size="12pt" style:font-size-asian="12pt" style:font-size-complex="12pt"/>
    </style:style>
    <style:style style:name="T41" style:family="text">
      <style:text-properties style:font-name="Aquatico" fo:font-size="12pt" style:font-size-asian="12pt" style:font-size-complex="12pt"/>
    </style:style>
    <style:style style:name="T42" style:family="text">
      <style:text-properties fo:font-family="'Conthrax Sb'" style:font-family-generic="swiss" style:font-pitch="variable"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entercomb</text:span> <text:span text:style-name="T2">VST</text:span> </text:p>
      <text:p text:style-name="P1"><text:tab/><text:tab/><text:span text:style-name="T3">Manual </text:span><text:span text:style-name="T4">for Windows</text:span><text:span text:style-name="T5"><text:tab/></text:span><text:span text:style-name="T6">by aquanode </text:span><text:span text:style-name="T7">(2026)</text:span></text:p>
      <text:p text:style-name="P2"><draw:line text:anchor-type="paragraph" draw:z-index="4" draw:name="Line 1" draw:style-name="gr1" draw:text-style-name="P3" svg:x1="-1.11cm" svg:y1="0.344cm" svg:x2="17.326cm" svg:y2="0.345cm"><text:p/></draw:line></text:p>
      <text:p text:style-name="P4"/>
      <text:p text:style-name="P4"><draw:frame draw:style-name="fr1" draw:name="Image1" text:anchor-type="char" svg:width="13.78cm" svg:height="12.644cm" draw:z-index="5"><draw:image xlink:href="Pictures/10000001000002D90000029D8CDC984A.png" xlink:type="simple" xlink:show="embed" xlink:actuate="onLoad" draw:mime-type="image/png"/></draw:frame><draw:frame draw:style-name="fr2" draw:name="Image3 Copy 1 Copy 2" text:anchor-type="char" svg:x="-2cm" svg:y="-2cm" svg:width="21.001cm" svg:height="29.7cm" draw:z-index="3"><draw:image xlink:href="Pictures/1000000100000104000001E5E3A1B9D2.png" xlink:type="simple" xlink:show="embed" xlink:actuate="onLoad" draw:mime-type="image/png"/></draw:frame></text:p>
      <text:p text:style-name="P5">WARNING: Using both the multiplicative spread AND mirror or wrap mode SIMULTANEOUSLY is experimental and will very likely produce loud volume spikes – <text:span text:style-name="T8">especially when you add tines. </text:span>I recommend only using one of these modes at a time, <text:span text:style-name="T8">then everything should be fine.</text:span></text:p>
      <text:p text:style-name="P6"><text:span text:style-name="T9">Personal / Copyright Message:</text:span> <text:span text:style-name="T10">This plugin is a passion project for the community.</text:span> <text:span text:style-name="T10">The compiled plugin Is free, and the source code open. Keeping</text:span> <text:span text:style-name="T10">things simple &amp;</text:span> <text:span text:style-name="T10">fair, the</text:span> <text:span text:style-name="T10">rules are as follows:</text:span></text:p>
      <text:list text:style-name="L1">
        <text:list-item>
          <text:p text:style-name="P7"><text:span text:style-name="T11">Open Source: </text:span><text:span text:style-name="T12">The source code is available for free, it comes together with the plugin when you download it. To compile from source, you need JUCE and Visual Code. You are welcome to modify the code and use it however you like, but don’t </text:span><text:span text:style-name="T13">sell</text:span><text:span text:style-name="T12"> it </text:span><text:span text:style-name="T14">for money </text:span><text:span text:style-name="T12">unaltered. </text:span><text:span text:style-name="T14">Sharing everything for free is totally fine, and encouraged! If you build the code into your own projects (i.e. alter it to a certain amount that it becomes your own thing), then you can sell it as your own thing of course.</text:span></text:p>
        </text:list-item>
        <text:list-item>
          <text:p text:style-name="P8"><text:span text:style-name="T9">Official Support: </text:span><text:span text:style-name="T15">If you don’t want to compile the plugin yourself, you can download</text:span><text:span text:style-name="T10"> </text:span><text:span text:style-name="T15">it. The </text:span><text:span text:style-name="T9">only </text:span><text:span text:style-name="T15">official</text:span><text:span text:style-name="T10"> </text:span><text:span text:style-name="T15">place to purchase the VST3 file directly is </text:span><text:a xlink:type="simple" xlink:href="https://aquanode.gumroad.com/" office:target-frame-name="_blank" xlink:show="new" text:style-name="Internet_20_link" text:visited-style-name="Visited_20_Internet_20_Link"><text:span text:style-name="T15">aquanode.gumroad.com</text:span></text:a><text:span text:style-name="T15"> for a recommended amount of </text:span><text:span text:style-name="T10">€</text:span><text:span text:style-name="T15">3, but feel free to type in 0. Buying there ensures you have the original</text:span><text:span text:style-name="T10"> </text:span><text:span text:style-name="T15">files</text:span><text:span text:style-name="T10"> </text:span><text:span text:style-name="T15">and my sincere thanks for your support. </text:span></text:p>
        </text:list-item>
        <text:list-item>
          <text:p text:style-name="P7"><text:span text:style-name="T11">Sharing is Caring:</text:span> I don’t track licenses, so you may share the VST with your friends, as long as <text:span text:style-name="T11">you do not charge money for it</text:span>. If you see this plugin being <text:span text:style-name="T11">sold</text:span> anywhere else, it’s a scam.</text:p>
        </text:list-item>
        <text:list-item>
          <text:p text:style-name="P7"><text:span text:style-name="T11">No Warranty:</text:span> I am not responsible for any damages, and when you download the plugin from a third-party website, for malware or viruses. Use such versions at your own risk.</text:p>
        </text:list-item>
      </text:list>
      <text:p text:style-name="P9">T<text:span text:style-name="T16">hank you for your interest in my </text:span><text:span text:style-name="T17">3rd V</text:span><text:span text:style-name="T16">ST plugin, which I built with JUCE/</text:span><text:span text:style-name="T18">Visual Code C++.</text:span></text:p>
      <text:p text:style-name="P10"/>
      <text:p text:style-name="P11"><text:span text:style-name="T19">“</text:span><text:span text:style-name="T20">CenterComb</text:span><text:span text:style-name="T21">” is, as the n</text:span><text:span text:style-name="T22">ame suggests, a</text:span><text:span text:style-name="T23"> flanger-inspired comb filter effect built from a bank of parallel </text:span><text:span text:style-name="Strong_20_Emphasis"><text:span text:style-name="T24">bell </text:span></text:span><text:span text:style-name="Strong_20_Emphasis"><text:span text:style-name="T25">peak </text:span></text:span><text:span text:style-name="Strong_20_Emphasis"><text:span text:style-name="T24">filters</text:span></text:span><text:span text:style-name="T24"> </text:span><text:span text:style-name="T23">distributed symmetrically around a central frequency. </text:span></text:p>
      <text:p text:style-name="P12"/>
      <text:p text:style-name="P13">It is a VST equivalent of <text:span text:style-name="T17">an </text:span>earlier bandpass filter effect I created in FL Studio’s Patcher for example, <text:span text:style-name="T26">that are free to download on </text:span><text:a xlink:type="simple" xlink:href="http://aquanode.gumroad.com/" text:style-name="Internet_20_link" text:visited-style-name="Visited_20_Internet_20_Link"><text:span text:style-name="T26">aquanode.gumroad.com</text:span></text:a><text:span text:style-name="T26">.</text:span></text:p>
      <text:p text:style-name="P12"/>
      <text:p text:style-name="P14">Features</text:p>
      <text:p text:style-name="P14"/>
      <text:list text:style-name="L2">
        <text:list-item>
          <text:p text:style-name="P15"><text:span text:style-name="T13">NEW in version 1.1: Smoothing</text:span> for smooth transitions between filter states when you move knobs. This makes sometimes very nice bubble / liquid sounds.</text:p>
        </text:list-item>
        <text:list-item>
          <text:p text:style-name="P15"><text:span text:style-name="T13">NEW in version 1.1: Mirror and Wrap Modes</text:span>. If Mirror mode is active, frequencies that would be outside the audible range will be mirrored at 20 and 22000 Hertz respectively. This is kind of an "aliasing" mode and can produce nice tones. The same goes for the Wrapping mode: If it is active, frequencies that go out of one boundary will reappear at the other one. Please note that using BOTH Multiplicative and either Mirror or Wrap Mode at the same time is experimental, as for many tines frequencies quickly become too large for floating point accuracies. I implemented some safety measures on the fly, they are not indended to be mathematically correct.</text:p>
        </text:list-item>
        <text:list-item>
          <text:p text:style-name="P16"><draw:frame draw:style-name="fr2" draw:name="Image3 Copy 1 Copy 1" text:anchor-type="char" svg:x="-2cm" svg:y="-2cm" svg:width="21.001cm" svg:height="29.7cm" draw:z-index="2"><draw:image xlink:href="Pictures/1000000100000104000001E5E3A1B9D2.png" xlink:type="simple" xlink:show="embed" xlink:actuate="onLoad" draw:mime-type="image/png"/></draw:frame><text:span text:style-name="T27">Up to </text:span><text:span text:style-name="Strong_20_Emphasis"><text:span text:style-name="T27">129 simultaneously active bell filters</text:span></text:span><text:span text:style-name="T27">, each ranging from </text:span><text:span text:style-name="Strong_20_Emphasis"><text:span text:style-name="T27">−24 dB to +24 dB</text:span></text:span><text:span text:style-name="T27">.</text:span></text:p>
          <text:p text:style-name="P17"/>
        </text:list-item>
        <text:list-item>
          <text:p text:style-name="P16"><text:span text:style-name="Strong_20_Emphasis"><text:span text:style-name="T23">Linear and multiplicative bell peak distribution modes</text:span></text:span><text:span text:style-name="T23">, allowing filter spacing by fixed Hertz values or exponential frequency ratios.</text:span></text:p>
          <text:p text:style-name="P17"/>
        </text:list-item>
        <text:list-item>
          <text:p text:style-name="P16"><text:span text:style-name="T27">A real-time </text:span><text:span text:style-name="Strong_20_Emphasis"><text:span text:style-name="T27">graphical frequency response display</text:span></text:span><text:span text:style-name="T27">, also independently switchable between </text:span><text:span text:style-name="Strong_20_Emphasis"><text:span text:style-name="T27">linear and logarithmic frequency visualization modes</text:span></text:span><text:span text:style-name="T27">.</text:span></text:p>
          <text:p text:style-name="P17"/>
        </text:list-item>
        <text:list-item>
          <text:p text:style-name="P16"><text:span text:style-name="Strong_20_Emphasis"><text:span text:style-name="T27">Center frequency anchoring</text:span></text:span><text:span text:style-name="T27">, with symmetrical bell filter placement above and below the selected frequency.</text:span></text:p>
          <text:p text:style-name="P17"/>
        </text:list-item>
        <text:list-item>
          <text:p text:style-name="P16"><text:span text:style-name="Strong_20_Emphasis"><text:span text:style-name="T27">Resonance (Q) control</text:span></text:span><text:span text:style-name="T27"> for shaping filter sharpness from smooth tonal curves to extreme spectral peaks.</text:span></text:p>
          <text:p text:style-name="P17"/>
        </text:list-item>
        <text:list-item>
          <text:p text:style-name="P16"><text:span text:style-name="Strong_20_Emphasis"><text:span text:style-name="T27">Spectral dampening control</text:span></text:span><text:span text:style-name="T27"> to progressively attenuate outer filter tines for smoother or more aggressive responses.</text:span></text:p>
          <text:p text:style-name="P17"/>
        </text:list-item>
        <text:list-item>
          <text:p text:style-name="P16"><text:span text:style-name="Strong_20_Emphasis"><text:span text:style-name="T27">Wet-only output mode</text:span></text:span><text:span text:style-name="T27"> for pure spectral processing without dry signal.</text:span></text:p>
          <text:p text:style-name="P17"/>
        </text:list-item>
        <text:list-item>
          <text:p text:style-name="P16"><text:span text:style-name="T27">Optional </text:span><text:span text:style-name="Strong_20_Emphasis"><text:span text:style-name="T27">hard limiter</text:span></text:span><text:span text:style-name="T27"> to control extreme resonant peaks during aggressive sound design.</text:span></text:p>
          <text:p text:style-name="P17"/>
        </text:list-item>
        <text:list-item>
          <text:p text:style-name="P16"><text:span text:style-name="T27">Designed for </text:span><text:span text:style-name="Strong_20_Emphasis"><text:span text:style-name="T27">flanging, resonator effects, harmonic sculpting, and experimental sound design</text:span></text:span><text:span text:style-name="T27">.</text:span></text:p>
        </text:list-item>
      </text:list>
      <text:p text:style-name="P18"/>
      <text:p text:style-name="P19"><text:soft-page-break/></text:p>
      <text:p text:style-name="P20">How to install</text:p>
      <text:p text:style-name="P21"><text:span text:style-name="T28"><text:tab/>Next to the .vst3 and this pdf, you will find 4 files with endings .h and .cpp in this <text:tab/>folder. These make up the </text:span><text:span text:style-name="T29">complete source code for JUCE</text:span><text:span text:style-name="T28">, so you can compile and <text:tab/>remake the whole effect plugin yourself if you like. </text:span><text:span text:style-name="T30">Otherwise, you don’t need them.</text:span></text:p>
      <text:p text:style-name="P21"/>
      <text:p text:style-name="P22"><text:span text:style-name="T31"><text:tab/>As</text:span> I do not own a Mac, only PC / Windows is supported. The plugin was tested on <text:tab/>Windows 11 22H2, FL Studio 25, Ableton Live 11, <text:span text:style-name="T32">and using Tracktion’s pluginval.</text:span></text:p>
      <text:list text:style-name="L3">
        <text:list-item>
          <text:list>
            <text:list-item>
              <text:p text:style-name="P23"><text:span text:style-name="T33">Download</text:span><text:span text:style-name="T34"> the </text:span><text:span text:style-name="T35">zip file </text:span><text:span text:style-name="T36">and extract it (you did this already).</text:span></text:p>
            </text:list-item>
            <text:list-item>
              <text:p text:style-name="P23"><text:span text:style-name="T33">Copy</text:span><text:span text:style-name="T34"> the .</text:span><text:span text:style-name="T35">vst3</text:span><text:span text:style-name="T34"> file into your system's VST3 folder. Usually, this is: </text:span></text:p>
              <text:list>
                <text:list-header>
                  <text:p text:style-name="P23"><text:span text:style-name="Source_20_Text"><text:span text:style-name="T34">C:\Program Files\Common Files\VST3</text:span></text:span></text:p>
                </text:list-header>
              </text:list>
            </text:list-item>
            <text:list-item>
              <text:p text:style-name="P24"><text:span text:style-name="T11">Rescan</text:span> your DAW’<text:span text:style-name="T37">s plugin library</text:span> (FL Studio, Ableton Live, etc.). The plugin should appear under the "Effects" or "Filter" category.</text:p>
            </text:list-item>
            <text:list-item>
              <text:p text:style-name="P25"><draw:frame draw:style-name="fr2" draw:name="Image3 Copy 3" text:anchor-type="char" svg:x="-2cm" svg:y="-2cm" svg:width="21.001cm" svg:height="29.7cm" draw:z-index="0"><draw:image xlink:href="Pictures/1000000100000104000001E5E3A1B9D2.png" xlink:type="simple" xlink:show="embed" xlink:actuate="onLoad" draw:mime-type="image/png"/></draw:frame>Add it to a mixer track, to which sound is routed.</text:p>
            </text:list-item>
          </text:list>
        </text:list-item>
      </text:list>
      <text:p text:style-name="P26"/>
      <text:p text:style-name="P27">explanations of the controls</text:p>
      <text:p text:style-name="P27"/>
      <text:h text:style-name="P28" text:outline-level="3">Sliders</text:h>
      <text:p text:style-name="P29"/>
      <text:h text:style-name="P30" text:outline-level="4"><text:span text:style-name="Strong_20_Emphasis">Center Freq</text:span></text:h>
      <text:p text:style-name="P31">Sets the central anchor frequency of the comb. All additional filter “tines” are placed symmetrically around this frequency.</text:p>
      <text:h text:style-name="P30" text:outline-level="4"><text:span text:style-name="Strong_20_Emphasis">Tines</text:span></text:h>
      <text:p text:style-name="P31">Controls how many bell filters are added on each side of the center frequency.<text:line-break/>Higher values create denser, more complex comb patterns (up to <text:span text:style-name="T17">64 mirrored filters, giving you up to 1 + 2 x 64 = </text:span>129 total filters).</text:p>
      <text:h text:style-name="P30" text:outline-level="4"><text:span text:style-name="Strong_20_Emphasis">Main Gain (dB)</text:span></text:h>
      <text:p text:style-name="P31">Sets the gain applied to each bell filter before damping is applied. Higher values result in more pronounced peaks and resonances.</text:p>
      <text:h text:style-name="P30" text:outline-level="4"><text:span text:style-name="Strong_20_Emphasis">Spread</text:span></text:h>
      <text:p text:style-name="P31">Controls the distance between tines:</text:p>
      <text:list text:style-name="L4">
        <text:list-item>
          <text:p text:style-name="P32"><text:span text:style-name="Strong_20_Emphasis">Linear mode (Hz):</text:span> Tines are spaced evenly in Hertz.</text:p>
        </text:list-item>
        <text:list-item>
          <text:p text:style-name="P32"><text:span text:style-name="Strong_20_Emphasis">Multiplicative mode (Ratio):</text:span> Each tine is spaced by a frequency ratio, creating musically exponential spacing.</text:p>
        </text:list-item>
      </text:list>
      <text:p text:style-name="P31"><text:tab/>The spread mode can be toggled via the <text:span text:style-name="Strong_20_Emphasis">Spread Mode</text:span> button, <text:span text:style-name="T38">see below.</text:span></text:p>
      <text:h text:style-name="P30" text:outline-level="4"><text:soft-page-break/><text:span text:style-name="Strong_20_Emphasis">Resonance (Q)</text:span></text:h>
      <text:p text:style-name="P31">Controls the sharpness of each bell filter.<text:line-break/>Low values create smooth, wide curves; high values produce sharp, resonant peaks.</text:p>
      <text:h text:style-name="P30" text:outline-level="4"><text:span text:style-name="Strong_20_Emphasis">Dampening</text:span></text:h>
      <text:p text:style-name="P31">Gradually reduces the gain of tines as they move farther from the center frequency. This helps tame extreme peaks and creates more natural spectral falloff.</text:p>
      <text:h text:style-name="P33" text:outline-level="3">Toggles</text:h>
      <text:h text:style-name="P30" text:outline-level="4"><text:span text:style-name="Strong_20_Emphasis">Linear View</text:span></text:h>
      <text:p text:style-name="P31">Switches the response visualizer between:</text:p>
      <text:list text:style-name="L5">
        <text:list-item>
          <text:p text:style-name="P34">Linear frequency display</text:p>
        </text:list-item>
        <text:list-item>
          <text:p text:style-name="P34"><draw:frame draw:style-name="fr2" draw:name="Image3 Copy 1" text:anchor-type="char" svg:x="-2cm" svg:y="-2cm" svg:width="21.001cm" svg:height="29.7cm" draw:z-index="1"><draw:image xlink:href="Pictures/1000000100000104000001E5E3A1B9D2.png" xlink:type="simple" xlink:show="embed" xlink:actuate="onLoad" draw:mime-type="image/png"/></draw:frame>Logarithmic frequency display</text:p>
        </text:list-item>
      </text:list>
      <text:p text:style-name="P31">(This does not affect audio — only visualization.)</text:p>
      <text:h text:style-name="P30" text:outline-level="4"><text:span text:style-name="Strong_20_Emphasis">Spread Mode</text:span></text:h>
      <text:p text:style-name="P31">Toggles between:</text:p>
      <text:list text:style-name="L6">
        <text:list-item>
          <text:p text:style-name="P35">Linear (Hz) spacing</text:p>
        </text:list-item>
        <text:list-item>
          <text:p text:style-name="P35">Multiplicative (ratio-based) spacing</text:p>
        </text:list-item>
      </text:list>
      <text:h text:style-name="P30" text:outline-level="4"><text:span text:style-name="Strong_20_Emphasis">Wet Only</text:span></text:h>
      <text:p text:style-name="P31">Outputs only the processed signal, removing the dry input entirely.</text:p>
      <text:h text:style-name="P30" text:outline-level="4"><text:span text:style-name="Strong_20_Emphasis">Hard Limiter</text:span></text:h>
      <text:p text:style-name="P31">Engages a safety limiter to prevent extreme resonant peaks from clipping.<text:line-break/>Disabling this allows for aggressive sound design — use with caution.</text:p>
      <text:p text:style-name="P36"><text:span text:style-name="T13">Mode Selector</text:span> (New in Version 1.1)</text:p>
      <text:p text:style-name="P36"><text:tab/>Regular:<text:tab/><text:tab/>Frequencies extending outside of 20 to 22000 Hz are cut off.</text:p>
      <text:p text:style-name="P36"><text:tab/>Mirror Mode:<text:tab/><text:tab/>Frequencies extending the range will get mirrored at the ends.</text:p>
      <text:p text:style-name="P36"><text:tab/>Wrap Mode:<text:tab/><text:tab/>Frequencies extending the range will appear at the other end.</text:p>
      <text:p text:style-name="P37">Smoothing Knob</text:p>
      <text:p text:style-name="P38">If you change a knob value such as spread, it will either be instantly if smoothing is turned all the way to 0, or will take up to a few seconds until the new state is reached.</text:p>
      <text:p text:style-name="P39">Many thanks to Google for their Gemini AI that was indispensable for me to grasp how JUCE and C++ programming even works. <text:span text:style-name="T39">It was a real time-saver, as I did not need to become an expert in all the details. The downside to that is of course that I’d still not be able to program a plugin without its help.</text:span></text:p>
      <text:p text:style-name="P40"><text:span text:style-name="T40">Fonts used in this Documentation: </text:span><text:span text:style-name="T41">Aquatico</text:span><text:span text:style-name="T40">, Bahnschrift, </text:span><text:span text:style-name="T42">Conthrax.</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quatico" svg:font-family="Aquatico" style:font-family-generic="modern" style:font-pitch="variable"/>
    <style:font-face style:name="Bahnschrift" svg:font-family="Bahnschrift"/>
    <style:font-face style:name="Bahnschrift1" svg:font-family="Bahnschrift" style:font-family-generic="swiss" style:font-pitch="variable"/>
    <style:font-face style:name="Bahnschrift2" svg:font-family="Bahnschrif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2T13:52:07.277827600</meta:creation-date>
    <dc:date>2026-02-03T13:25:41.831559400</dc:date>
    <meta:editing-duration>PT2H18M29S</meta:editing-duration>
    <meta:editing-cycles>99</meta:editing-cycles>
    <meta:generator>LibreOffice/25.8.3.2$Windows_X86_64 LibreOffice_project/8ca8d55c161d602844f5428fa4b58097424e324e</meta:generator>
    <meta:print-date>2026-01-27T18:02:18.497111300</meta:print-date>
    <meta:printed-by>PDF files</meta:printed-by>
    <meta:document-statistic meta:table-count="0" meta:image-count="5" meta:object-count="0" meta:page-count="4" meta:paragraph-count="78" meta:word-count="1198" meta:character-count="7063" meta:non-whitespace-character-count="5947"/>
  </office:meta>
</office:document-meta>
</file>