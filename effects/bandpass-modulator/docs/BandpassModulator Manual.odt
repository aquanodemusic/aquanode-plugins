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04000001E5E3A1B9D2.png" manifest:media-type="image/png"/>
  <manifest:file-entry manifest:full-path="Pictures/10000001000002E700000261D9A41FD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quatico" svg:font-family="Aquatico" style:font-family-generic="modern" style:font-pitch="variable"/>
    <style:font-face style:name="Bahnschrift" svg:font-family="Bahnschrift"/>
    <style:font-face style:name="Bahnschrift1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quatico" fo:font-size="32pt" officeooo:rsid="000c0540" officeooo:paragraph-rsid="000c0540" style:font-size-asian="32pt" style:font-size-complex="32pt"/>
    </style:style>
    <style:style style:name="P2" style:family="paragraph" style:parent-style-name="Standard">
      <style:text-properties style:font-name="Aquatico" fo:font-size="12pt" officeooo:rsid="000c0540" officeooo:paragraph-rsid="000c0540" style:font-size-asian="10.5pt" style:font-size-complex="12pt"/>
    </style:style>
    <style:style style:name="P3" style:family="paragraph">
      <style:paragraph-properties fo:text-align="center"/>
    </style:style>
    <style:style style:name="P4" style:family="paragraph" style:parent-style-name="Standard">
      <style:text-properties style:font-name="Aquatico" fo:font-size="12pt" officeooo:rsid="0033d260" officeooo:paragraph-rsid="000c0540" style:font-size-asian="10.5pt" style:font-size-complex="12pt"/>
    </style:style>
    <style:style style:name="P5" style:family="paragraph" style:parent-style-name="Standard">
      <style:text-properties style:font-name="Aquatico" fo:font-size="12pt" officeooo:rsid="0033d260" officeooo:paragraph-rsid="0033d260" style:font-size-asian="10.5pt" style:font-size-complex="12pt"/>
    </style:style>
    <style:style style:name="P6" style:family="paragraph" style:parent-style-name="Text_20_body">
      <style:text-properties officeooo:paragraph-rsid="004026ca"/>
    </style:style>
    <style:style style:name="P7" style:family="paragraph" style:parent-style-name="Text_20_body" style:list-style-name="L1">
      <style:text-properties fo:color="#999999" loext:opacity="100%" style:font-name="Bahnschrift1" fo:font-size="9pt" fo:font-weight="bold" officeooo:rsid="005244e4" officeooo:paragraph-rsid="005244e4" style:font-size-asian="9pt" style:font-size-complex="9pt"/>
    </style:style>
    <style:style style:name="P8" style:family="paragraph" style:parent-style-name="Text_20_body" style:list-style-name="L1">
      <style:text-properties fo:color="#999999" loext:opacity="100%" style:font-name="Bahnschrift1" fo:font-size="9pt" officeooo:rsid="0034ecce" officeooo:paragraph-rsid="004026ca" style:font-size-asian="9pt" style:font-size-complex="9pt"/>
    </style:style>
    <style:style style:name="P9" style:family="paragraph" style:parent-style-name="Text_20_body" style:list-style-name="L1">
      <style:text-properties fo:color="#999999" loext:opacity="100%" style:font-name="Bahnschrift1" fo:font-size="9pt" officeooo:rsid="0034ecce" officeooo:paragraph-rsid="0054d7c7" style:font-size-asian="9pt" style:font-size-complex="9pt"/>
    </style:style>
    <style:style style:name="P10" style:family="paragraph" style:parent-style-name="Text_20_body" style:list-style-name="L1">
      <style:text-properties fo:color="#999999" loext:opacity="100%" style:font-name="Bahnschrift1" fo:font-size="9pt" officeooo:rsid="0034ecce" style:font-size-asian="9pt" style:font-size-complex="9pt"/>
    </style:style>
    <style:style style:name="P11" style:family="paragraph" style:parent-style-name="Standard">
      <style:paragraph-properties fo:break-before="page"/>
      <style:text-properties style:font-name="Bahnschrift1" fo:font-size="12pt" officeooo:rsid="000d0e80" officeooo:paragraph-rsid="000d0e80" style:font-size-asian="10.5pt" style:font-size-complex="12pt"/>
    </style:style>
    <style:style style:name="P12" style:family="paragraph" style:parent-style-name="Standard">
      <style:text-properties style:font-name="Bahnschrift1" fo:font-size="12pt" officeooo:rsid="000d0e80" officeooo:paragraph-rsid="000d0e80" style:font-size-asian="10.5pt" style:font-size-complex="12pt"/>
    </style:style>
    <style:style style:name="P13" style:family="paragraph" style:parent-style-name="Standard">
      <style:text-properties style:font-name="Bahnschrift" officeooo:paragraph-rsid="000d0e80"/>
    </style:style>
    <style:style style:name="P14" style:family="paragraph" style:parent-style-name="Standard">
      <style:text-properties style:font-name="Bahnschrift" officeooo:rsid="002d892b" officeooo:paragraph-rsid="002d892b"/>
    </style:style>
    <style:style style:name="P15" style:family="paragraph" style:parent-style-name="Standard">
      <style:text-properties style:font-name="Aquatico" fo:font-size="18pt" style:text-underline-style="solid" style:text-underline-width="auto" style:text-underline-color="font-color" officeooo:rsid="0012032a" officeooo:paragraph-rsid="0012032a" style:font-size-asian="18pt" style:font-size-complex="18pt"/>
    </style:style>
    <style:style style:name="P16" style:family="paragraph" style:parent-style-name="Standard">
      <style:text-properties style:font-name="Aquatico" officeooo:rsid="0012032a" officeooo:paragraph-rsid="0012032a"/>
    </style:style>
    <style:style style:name="P17" style:family="paragraph" style:parent-style-name="Standard" style:list-style-name="L2">
      <style:text-properties style:font-name="Bahnschrift1" officeooo:rsid="00135c29" officeooo:paragraph-rsid="00135c29"/>
    </style:style>
    <style:style style:name="P18" style:family="paragraph" style:parent-style-name="Standard" style:list-style-name="L2">
      <style:text-properties style:font-name="Bahnschrift1" fo:font-weight="bold" officeooo:rsid="00135c29" officeooo:paragraph-rsid="00135c29" style:font-weight-asian="bold" style:font-weight-complex="bold"/>
    </style:style>
    <style:style style:name="P19" style:family="paragraph" style:parent-style-name="Standard" style:list-style-name="L2">
      <style:text-properties style:font-name="Bahnschrift1" officeooo:rsid="00135c29" officeooo:paragraph-rsid="005cba2a"/>
    </style:style>
    <style:style style:name="P20" style:family="paragraph" style:parent-style-name="Standard">
      <style:text-properties style:font-name="Bahnschrift1" officeooo:rsid="00135c29" officeooo:paragraph-rsid="00135c29"/>
    </style:style>
    <style:style style:name="P21" style:family="paragraph" style:parent-style-name="Standard">
      <style:text-properties style:font-name="Bahnschrift1" fo:font-style="italic" officeooo:rsid="00135c29" officeooo:paragraph-rsid="00135c29" style:font-style-asian="italic" style:font-style-complex="italic"/>
    </style:style>
    <style:style style:name="P22" style:family="paragraph" style:parent-style-name="Standard" style:list-style-name="L3">
      <style:text-properties style:font-name="Bahnschrift1" fo:font-style="normal" officeooo:rsid="005cba2a" officeooo:paragraph-rsid="005cba2a" style:font-style-asian="normal" style:font-style-complex="normal"/>
    </style:style>
    <style:style style:name="P23" style:family="paragraph" style:parent-style-name="Standard">
      <style:text-properties style:font-name="Bahnschrift1" fo:font-style="normal" officeooo:rsid="005cba2a" officeooo:paragraph-rsid="005cba2a" style:font-style-asian="normal" style:font-style-complex="normal"/>
    </style:style>
    <style:style style:name="P24" style:family="paragraph" style:parent-style-name="Text_20_body">
      <style:text-properties style:font-name="Aquatico" fo:font-size="18pt" style:text-underline-style="solid" style:text-underline-width="auto" style:text-underline-color="font-color" officeooo:rsid="001fcb9b" officeooo:paragraph-rsid="005fc839" style:font-size-asian="18pt" style:font-size-complex="18pt"/>
    </style:style>
    <style:style style:name="P25" style:family="paragraph" style:parent-style-name="Standard">
      <style:text-properties style:font-name="Bahnschrift1" fo:font-size="12pt" style:text-underline-style="none" officeooo:rsid="001fcb9b" officeooo:paragraph-rsid="005fc839" style:font-size-asian="10.5pt" style:font-size-complex="12pt"/>
    </style:style>
    <style:style style:name="P26" style:family="paragraph" style:parent-style-name="Text_20_body">
      <style:text-properties style:font-name="Bahnschrift1" fo:font-size="12pt" officeooo:rsid="0025d022" officeooo:paragraph-rsid="005fc839" style:font-size-asian="12pt" style:font-size-complex="12pt"/>
    </style:style>
    <style:style style:name="P27" style:family="paragraph" style:parent-style-name="Text_20_body" style:list-style-name="L4">
      <style:text-properties style:font-name="Aquatico" officeooo:rsid="0012032a" officeooo:paragraph-rsid="005fc839"/>
    </style:style>
    <style:style style:name="P28" style:family="paragraph" style:parent-style-name="Text_20_body" style:list-style-name="L4">
      <style:text-properties style:font-name="Bahnschrift1" fo:font-size="12pt" officeooo:rsid="0012032a" officeooo:paragraph-rsid="005fc839" style:font-size-asian="12pt" style:font-size-complex="12pt"/>
    </style:style>
    <style:style style:name="P29" style:family="paragraph" style:parent-style-name="Text_20_body" style:list-style-name="L4">
      <style:text-properties style:font-name="Bahnschrift1" fo:font-size="12pt" officeooo:rsid="0023fca2" officeooo:paragraph-rsid="005fc839" style:font-size-asian="12pt" style:font-size-complex="12pt"/>
    </style:style>
    <style:style style:name="P30" style:family="paragraph" style:parent-style-name="Standard">
      <style:text-properties style:font-name="Aquatico" fo:font-size="18pt" fo:font-style="normal" style:text-underline-style="solid" style:text-underline-width="auto" style:text-underline-color="font-color" officeooo:rsid="0012032a" officeooo:paragraph-rsid="0012032a" style:font-size-asian="18pt" style:font-style-asian="normal" style:font-size-complex="18pt" style:font-style-complex="normal"/>
    </style:style>
    <style:style style:name="P31" style:family="paragraph" style:parent-style-name="Text_20_body" style:list-style-name="L5">
      <style:text-properties style:font-name="Bahnschrift" officeooo:rsid="0012032a"/>
    </style:style>
    <style:style style:name="P32" style:family="paragraph" style:parent-style-name="Text_20_body" style:list-style-name="L5">
      <style:text-properties style:font-name="Bahnschrift" officeooo:rsid="0012032a" officeooo:paragraph-rsid="001fcb9b"/>
    </style:style>
    <style:style style:name="P33" style:family="paragraph" style:parent-style-name="Text_20_body" style:list-style-name="L5">
      <style:text-properties style:font-name="Bahnschrift" officeooo:rsid="0012032a" officeooo:paragraph-rsid="0021adb3"/>
    </style:style>
    <style:style style:name="P34" style:family="paragraph" style:parent-style-name="Text_20_body">
      <style:text-properties style:font-name="Bahnschrift" officeooo:rsid="0012032a"/>
    </style:style>
    <style:style style:name="P35" style:family="paragraph" style:parent-style-name="Text_20_body">
      <style:text-properties fo:color="#2a9cec" loext:opacity="100%" style:font-name="Bahnschrift1" fo:font-size="9pt" officeooo:rsid="002b4df7" officeooo:paragraph-rsid="002b4df7" style:font-size-asian="9pt" style:font-size-complex="9pt"/>
    </style:style>
    <style:style style:name="P36" style:family="paragraph" style:parent-style-name="Text_20_body">
      <style:text-properties fo:color="#2a9cec" loext:opacity="100%" style:font-name="Bahnschrift1" officeooo:rsid="002971c9" officeooo:paragraph-rsid="002971c9"/>
    </style:style>
    <style:style style:name="T1" style:family="text">
      <style:text-properties fo:color="#2a9cec" loext:opacity="100%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9pt" fo:font-style="italic" fo:font-weight="bold" officeooo:rsid="00643adb" style:font-size-asian="9pt" style:font-style-asian="italic" style:font-weight-asian="bold" style:font-size-complex="9pt" style:font-style-complex="italic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2a9cec" loext:opacity="100%" fo:font-family="'Conthrax Sb'" style:font-family-generic="swiss" style:font-pitch="variable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2a9cec" loext:opacity="100%" fo:font-family="'Conthrax Sb'" style:font-family-generic="swiss" style:font-pitch="variable" fo:font-size="12pt" fo:font-style="normal" fo:font-weight="normal" officeooo:rsid="0032f932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999999" loext:opacity="100%" style:font-name="Bahnschrift1" fo:font-size="9pt" fo:font-weight="bold" officeooo:rsid="0034ecce" style:font-size-asian="9pt" style:font-size-complex="9pt"/>
    </style:style>
    <style:style style:name="T8" style:family="text">
      <style:text-properties fo:color="#999999" loext:opacity="100%" style:font-name="Bahnschrift1" fo:font-size="9pt" fo:font-weight="bold" officeooo:rsid="003a56ce" style:font-size-asian="9pt" style:font-size-complex="9pt"/>
    </style:style>
    <style:style style:name="T9" style:family="text">
      <style:text-properties fo:color="#999999" loext:opacity="100%" style:font-name="Bahnschrift1" fo:font-size="9pt" officeooo:rsid="0034ecce" style:font-size-asian="9pt" style:font-size-complex="9pt"/>
    </style:style>
    <style:style style:name="T10" style:family="text">
      <style:text-properties fo:color="#999999" loext:opacity="100%" style:font-name="Bahnschrift1" fo:font-size="9pt" officeooo:rsid="003a56ce" style:font-size-asian="9pt" style:font-size-complex="9pt"/>
    </style:style>
    <style:style style:name="T11" style:family="text">
      <style:text-properties fo:color="#999999" loext:opacity="100%" style:font-name="Bahnschrift1" fo:font-size="9pt" officeooo:rsid="0054d7c7" style:font-size-asian="9pt" style:font-size-complex="9pt"/>
    </style:style>
    <style:style style:name="T12" style:family="text">
      <style:text-properties fo:color="#999999" loext:opacity="100%" style:font-name="Bahnschrift1" fo:font-size="9pt" officeooo:rsid="006a07cf" style:font-size-asian="9pt" style:font-size-complex="9pt"/>
    </style:style>
    <style:style style:name="T13" style:family="text">
      <style:text-properties fo:color="#999999" loext:opacity="100%" style:font-name="Bahnschrift1" fo:font-size="9pt" officeooo:rsid="0061e8ce" style:font-size-asian="9pt" style:font-size-complex="9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6a07cf" style:font-weight-asian="normal" style:font-weight-complex="normal"/>
    </style:style>
    <style:style style:name="T16" style:family="text">
      <style:text-properties fo:font-weight="normal" officeooo:rsid="0054d7c7" style:font-weight-asian="normal" style:font-weight-complex="normal"/>
    </style:style>
    <style:style style:name="T17" style:family="text">
      <style:text-properties fo:font-weight="normal" officeooo:rsid="0052dfc7" style:font-weight-asian="normal" style:font-weight-complex="normal"/>
    </style:style>
    <style:style style:name="T18" style:family="text">
      <style:text-properties fo:font-weight="bold"/>
    </style:style>
    <style:style style:name="T19" style:family="text">
      <style:text-properties fo:font-weight="normal" officeooo:rsid="005a5231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officeooo:rsid="005244e4" style:font-weight-asian="normal" style:font-weight-complex="normal"/>
    </style:style>
    <style:style style:name="T22" style:family="text">
      <style:text-properties fo:font-weight="normal" officeooo:rsid="003c43a8" style:font-weight-asian="normal" style:font-weight-complex="normal"/>
    </style:style>
    <style:style style:name="T23" style:family="text">
      <style:text-properties officeooo:rsid="005b3e21"/>
    </style:style>
    <style:style style:name="T24" style:family="text">
      <style:text-properties officeooo:rsid="0054d7c7"/>
    </style:style>
    <style:style style:name="T25" style:family="text">
      <style:text-properties fo:font-weight="bold" officeooo:rsid="0054d7c7" style:font-weight-asian="bold" style:font-weight-complex="bold"/>
    </style:style>
    <style:style style:name="T26" style:family="text">
      <style:text-properties officeooo:rsid="0054de3a"/>
    </style:style>
    <style:style style:name="T27" style:family="text">
      <style:text-properties officeooo:rsid="0041aa58"/>
    </style:style>
    <style:style style:name="T28" style:family="text">
      <style:text-properties officeooo:rsid="005b5124"/>
    </style:style>
    <style:style style:name="T29" style:family="text">
      <style:text-properties officeooo:rsid="005c5c35"/>
    </style:style>
    <style:style style:name="T30" style:family="text">
      <style:text-properties officeooo:rsid="000f5226"/>
    </style:style>
    <style:style style:name="T31" style:family="text">
      <style:text-properties officeooo:rsid="000fcc38"/>
    </style:style>
    <style:style style:name="T32" style:family="text">
      <style:text-properties fo:font-size="12pt" officeooo:rsid="000d0e80" style:font-size-asian="10.5pt" style:font-size-complex="12pt"/>
    </style:style>
    <style:style style:name="T33" style:family="text">
      <style:text-properties fo:font-size="12pt" officeooo:rsid="000f5226" style:font-size-asian="10.5pt" style:font-size-complex="12pt"/>
    </style:style>
    <style:style style:name="T34" style:family="text">
      <style:text-properties officeooo:rsid="00102a83"/>
    </style:style>
    <style:style style:name="T35" style:family="text">
      <style:text-properties officeooo:rsid="005cba2a"/>
    </style:style>
    <style:style style:name="T36" style:family="text">
      <style:text-properties officeooo:rsid="004dba66"/>
    </style:style>
    <style:style style:name="T37" style:family="text">
      <style:text-properties fo:font-weight="bold" officeooo:rsid="0015f949" style:font-weight-asian="bold" style:font-weight-complex="bold"/>
    </style:style>
    <style:style style:name="T38" style:family="text">
      <style:text-properties officeooo:rsid="0015f949"/>
    </style:style>
    <style:style style:name="T39" style:family="text">
      <style:text-properties officeooo:rsid="005e736d"/>
    </style:style>
    <style:style style:name="T40" style:family="text">
      <style:text-properties officeooo:rsid="002ed70e"/>
    </style:style>
    <style:style style:name="T41" style:family="text">
      <style:text-properties fo:font-weight="bold" officeooo:rsid="002ed70e" style:font-weight-asian="bold" style:font-weight-complex="bold"/>
    </style:style>
    <style:style style:name="T42" style:family="text">
      <style:text-properties officeooo:rsid="0063d0eb"/>
    </style:style>
    <style:style style:name="T43" style:family="text">
      <style:text-properties style:text-underline-style="none"/>
    </style:style>
    <style:style style:name="T44" style:family="text">
      <style:text-properties officeooo:rsid="00651afd"/>
    </style:style>
    <style:style style:name="T45" style:family="text">
      <style:text-properties style:font-name="Bahnschrift1" fo:font-size="12pt" fo:font-weight="bold" style:font-size-asian="12pt" style:font-size-complex="12pt"/>
    </style:style>
    <style:style style:name="T46" style:family="text">
      <style:text-properties style:font-name="Bahnschrift1" fo:font-size="12pt" style:font-size-asian="12pt" style:font-size-complex="12pt"/>
    </style:style>
    <style:style style:name="T47" style:family="text">
      <style:text-properties style:font-name="Bahnschrift1" fo:font-size="12pt" officeooo:rsid="00235970" style:font-size-asian="12pt" style:font-size-complex="12pt"/>
    </style:style>
    <style:style style:name="T48" style:family="text">
      <style:text-properties style:font-name="Bahnschrift1" fo:font-size="12pt" officeooo:rsid="002ed70e" style:font-size-asian="12pt" style:font-size-complex="12pt"/>
    </style:style>
    <style:style style:name="T49" style:family="text">
      <style:text-properties officeooo:rsid="00235970"/>
    </style:style>
    <style:style style:name="T50" style:family="text">
      <style:text-properties officeooo:rsid="0018f110"/>
    </style:style>
    <style:style style:name="T51" style:family="text">
      <style:text-properties officeooo:rsid="001ada80"/>
    </style:style>
    <style:style style:name="T52" style:family="text">
      <style:text-properties officeooo:rsid="001cc47e"/>
    </style:style>
    <style:style style:name="T53" style:family="text">
      <style:text-properties officeooo:rsid="001e0601"/>
    </style:style>
    <style:style style:name="T54" style:family="text">
      <style:text-properties officeooo:rsid="0020f8a3"/>
    </style:style>
    <style:style style:name="T55" style:family="text">
      <style:text-properties officeooo:rsid="0056bda3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style:font-name="Aquatico" fo:font-size="12pt" style:font-size-asian="12pt" style:font-size-complex="12pt"/>
    </style:style>
    <style:style style:name="T58" style:family="text">
      <style:text-properties fo:font-family="'Conthrax Sb'" style:font-family-generic="swiss" style:font-pitch="variable" fo:font-size="12pt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dpassModulator <text:span text:style-name="T1">VST</text:span> <draw:frame draw:style-name="fr1" draw:name="Image3 Copy 1 Copy 1" text:anchor-type="char" svg:x="-2cm" svg:y="-2cm" svg:width="21.001cm" svg:height="29.7cm" draw:z-index="2"><draw:image xlink:href="Pictures/1000000100000104000001E5E3A1B9D2.png" xlink:type="simple" xlink:show="embed" xlink:actuate="onLoad" draw:mime-type="image/png"/></draw:frame></text:p>
      <text:p text:style-name="P1"><text:tab/><text:tab/><text:span text:style-name="T2">Manual </text:span><text:span text:style-name="T3">for Windows</text:span><text:span text:style-name="T4"><text:tab/></text:span><text:span text:style-name="T5">by aquanode </text:span><text:span text:style-name="T6">(2026)</text:span></text:p>
      <text:p text:style-name="P2"><draw:line text:anchor-type="paragraph" draw:z-index="3" draw:name="Line 1" draw:style-name="gr1" draw:text-style-name="P3" svg:x1="-1.11cm" svg:y1="0.344cm" svg:x2="17.326cm" svg:y2="0.345cm"><text:p/></draw:line></text:p>
      <text:p text:style-name="P4"/>
      <text:p text:style-name="P5"><draw:frame draw:style-name="fr2" draw:name="Image1" text:anchor-type="char" svg:width="17cm" svg:height="13.915cm" draw:z-index="4"><draw:image xlink:href="Pictures/10000001000002E700000261D9A41FDD.png" xlink:type="simple" xlink:show="embed" xlink:actuate="onLoad" draw:mime-type="image/png"/></draw:frame></text:p>
      <text:p text:style-name="P5"/>
      <text:p text:style-name="P6"><text:span text:style-name="T7">Personal / </text:span><text:span text:style-name="T8">Copyright </text:span><text:span text:style-name="T7">Message:</text:span><text:span text:style-name="T9"> <text:tab/></text:span><text:span text:style-name="T10">T</text:span><text:span text:style-name="T9">his plugin is a passion project </text:span><text:span text:style-name="T11">for the community.</text:span><text:span text:style-name="T9"> </text:span><text:span text:style-name="T11">The </text:span><text:span text:style-name="T12">compiled plugin Is free, and <text:tab/><text:tab/><text:tab/><text:tab/>the source code open. </text:span><text:span text:style-name="T13">Keeping</text:span><text:span text:style-name="T9"> things simple </text:span><text:span text:style-name="T13">&amp;</text:span><text:span text:style-name="T9"> fair, </text:span><text:span text:style-name="T13">the</text:span><text:span text:style-name="T9"> rules </text:span><text:span text:style-name="T13">are as follows:</text:span></text:p>
      <text:list text:style-name="L1">
        <text:list-item>
          <text:p text:style-name="P7">Open Source:<text:tab/><text:tab/><text:span text:style-name="T14">The source code is available for free, it </text:span><text:span text:style-name="T15">c</text:span><text:span text:style-name="T14">omes together with the plugin </text:span><text:span text:style-name="T16">when you <text:tab/><text:tab/><text:tab/></text:span><text:span text:style-name="T15">download it</text:span><text:span text:style-name="T14">. To compile </text:span><text:span text:style-name="T17">from source</text:span><text:span text:style-name="T14">, you need JUCE <text:tab/>and Visual Code. You are <text:tab/><text:tab/><text:tab/><text:tab/>welcome to modify the code and use it however you like, </text:span><text:span text:style-name="T15">but don’t sell it unaltered.</text:span></text:p>
        </text:list-item>
        <text:list-item>
          <text:p text:style-name="P8"><text:span text:style-name="T18">Official Support: <text:tab/><text:tab/></text:span><text:span text:style-name="T17">If you don’t want to compile the plugin </text:span><text:span text:style-name="T19">yourself</text:span><text:span text:style-name="T17">, you can </text:span><text:span text:style-name="T15">download</text:span><text:span text:style-name="T17"> </text:span><text:span text:style-name="T16">it</text:span><text:span text:style-name="T17">. </text:span><text:span text:style-name="T14">The </text:span><text:span text:style-name="T20">only </text:span><text:span text:style-name="T19">official</text:span><text:span text:style-name="T14"><text:tab/><text:tab/><text:tab/>place to purchase th</text:span><text:span text:style-name="T21">e VST3 file directly </text:span><text:span text:style-name="T14">is </text:span><text:a xlink:type="simple" xlink:href="https://aquanode.gumroad.com/" office:target-frame-name="_blank" xlink:show="new" text:style-name="Internet_20_link" text:visited-style-name="Visited_20_Internet_20_Link"><text:span text:style-name="T14">aquanode.gumroad.com</text:span></text:a><text:span text:style-name="T14"> </text:span><text:span text:style-name="T19">for </text:span><text:span text:style-name="T15">a recommen-<text:tab/><text:tab/><text:tab/>ded amount of </text:span><text:span text:style-name="T19">€3, </text:span><text:span text:style-name="T15">but feel free to type in 0</text:span><text:span text:style-name="T19">. Buying </text:span><text:span text:style-name="T22">t</text:span><text:span text:style-name="T14">here ensures you have the <text:tab/><text:tab/><text:tab/><text:tab/>original</text:span><text:span text:style-name="T16"> files</text:span><text:span text:style-name="T14"> and </text:span><text:span text:style-name="T22">my </text:span><text:span text:style-name="T21">sincere thank</text:span><text:span text:style-name="T17">s </text:span><text:span text:style-name="T22">for your support. </text:span></text:p>
        </text:list-item>
        <text:list-item>
          <text:p text:style-name="P9"><text:span text:style-name="T18">Sharing is Caring:</text:span> <text:tab/><text:span text:style-name="T23">I don’t track licenses, so you may share the</text:span><text:span text:style-name="T24"> VST with your friends, as long as </text:span><text:span text:style-name="T25">you do <text:tab/><text:tab/><text:tab/>not charge money for it</text:span><text:span text:style-name="T24">. </text:span>If you see this plugin being <text:span text:style-name="T20">sold</text:span> anywhere else, it’s a scam.</text:p>
        </text:list-item>
        <text:list-item>
          <text:p text:style-name="P10"><text:span text:style-name="T18">No Warranty:</text:span> <text:tab/><text:tab/>I am not <text:span text:style-name="T26">res</text:span><text:span text:style-name="T27">ponsible </text:span>for any damages, <text:span text:style-name="T28">and when you download the plugin </text:span><text:span text:style-name="T29">from a <text:tab/></text:span><text:span text:style-name="T28"><text:tab/><text:tab/>third-</text:span><text:span text:style-name="T29">party website, for </text:span>malware or viruses. Use <text:span text:style-name="T26">such versions</text:span> at your own risk.</text:p>
        </text:list-item>
      </text:list>
      <text:p text:style-name="P11"><draw:frame draw:style-name="fr1" draw:name="Image3" text:anchor-type="char" svg:x="-2cm" svg:y="-2cm" svg:width="21.001cm" svg:height="29.7cm" draw:z-index="0"><draw:image xlink:href="Pictures/1000000100000104000001E5E3A1B9D2.png" xlink:type="simple" xlink:show="embed" xlink:actuate="onLoad" draw:mime-type="image/png"/></draw:frame>T<text:span text:style-name="T30">hank you for your interest in my </text:span><text:span text:style-name="T31">1st</text:span><text:span text:style-name="T30"> VST plugin, which I built with JUCE/</text:span><text:span text:style-name="T31">Visual Code C++.</text:span></text:p>
      <text:p text:style-name="P12"/>
      <text:p text:style-name="P13"><text:span text:style-name="T32">“</text:span><text:span text:style-name="T33">BandpassModulator” is, as the name suggests, a</text:span> rhythmic, musical bandpass filter plugin <text:span text:style-name="T34">featuring </text:span>a unique <text:span text:style-name="T18">Note Lock</text:span> system that keeps filter movements in tune with your track. </text:p>
      <text:p text:style-name="P13"/>
      <text:p text:style-name="P14">It is a VST equivalent of some earlier bandpass filter effects I created in FL Studio’s Patcher <text:span text:style-name="T35">and</text:span> plugdata for example, <text:span text:style-name="T36">that are free to download on </text:span><text:a xlink:type="simple" xlink:href="http://aquanode.gumroad.com/" text:style-name="Internet_20_link" text:visited-style-name="Visited_20_Internet_20_Link"><text:span text:style-name="T36">aquanode.gumroad.com</text:span></text:a><text:span text:style-name="T36">.</text:span></text:p>
      <text:p text:style-name="P13"/>
      <text:p text:style-name="P15">Features</text:p>
      <text:p text:style-name="P16"/>
      <text:list text:style-name="L2">
        <text:list-item>
          <text:p text:style-name="P17">A single state variable filter / <text:span text:style-name="T20">bandpass </text:span><text:span text:style-name="T37">filter</text:span><text:span text:style-name="T38"> </text:span>that automatically <text:span text:style-name="T20">jumps to random frequencies</text:span> in a <text:span text:style-name="T20">predefined frequency window</text:span>.</text:p>
          <text:p text:style-name="P17"/>
        </text:list-item>
        <text:list-item>
          <text:p text:style-name="P17">The filter first stays for a duration of “Stay” seconds at a random position, then it takes “Glide” seconds for it to reach a new frequency, where it stays another “Stay” seconds, where <text:span text:style-name="T20">“Stay” and “Glide” seconds refer to the value you choose for the respective sliders.</text:span></text:p>
          <text:p text:style-name="P18"/>
        </text:list-item>
        <text:list-item>
          <text:p text:style-name="P17"><text:span text:style-name="T20">Stereo Panning of the Filter</text:span> can be automated as well.</text:p>
          <text:p text:style-name="P17"/>
        </text:list-item>
        <text:list-item>
          <text:p text:style-name="P17">A <text:span text:style-name="T20">Note Lock</text:span> feature restricts the random filter jumps to frequencies corresponding to certain notes you can choose only.</text:p>
          <text:p text:style-name="P17"/>
        </text:list-item>
        <text:list-item>
          <text:p text:style-name="P19">Three<text:span text:style-name="T20"> </text:span><text:span text:style-name="T37">frequency j</text:span><text:span text:style-name="T20">umping modes</text:span> are implemented: </text:p>
          <text:p text:style-name="P19"/>
          <text:list>
            <text:list-item>
              <text:p text:style-name="P19"><text:span text:style-name="T20">Random:</text:span> The default mode where Stay and Glide behave as described above.</text:p>
              <text:p text:style-name="P17"/>
            </text:list-item>
            <text:list-item>
              <text:p text:style-name="P17"><text:span text:style-name="T20">Up: </text:span>The frequency slides upwards, or jumps through the lowest to the highest note if note lock is active.</text:p>
              <text:p text:style-name="P17"/>
            </text:list-item>
            <text:list-item>
              <text:p text:style-name="P17"><text:span text:style-name="T20">Down: </text:span>Same as Up, but the jumps are downwards.</text:p>
            </text:list-item>
          </text:list>
        </text:list-item>
      </text:list>
      <text:p text:style-name="P20"/>
      <text:p text:style-name="P21"><text:tab/>Please note that Glide is deactivated for the filter (but not the panning) when Up or <text:tab/>Down mode is selected.</text:p>
      <text:p text:style-name="P21"/>
      <text:list text:style-name="L3">
        <text:list-item>
          <text:p text:style-name="P22">A graphical filter representation, that cycles <text:span text:style-name="T39">in </text:span>color between white and cyan.</text:p>
        </text:list-item>
      </text:list>
      <text:p text:style-name="P23"/>
      <text:p text:style-name="P24">How to install</text:p>
      <text:p text:style-name="P25"><text:span text:style-name="T40"><text:tab/>Next to the .vst3 and this pdf, you will find 4 files with endings .h and .cpp in this <text:tab/>folder. These make up the </text:span><text:span text:style-name="T41">complete source code for JUCE</text:span><text:span text:style-name="T40">, so you can compile and <text:tab/>remake the whole effect plugin yourself if you like. </text:span><text:span text:style-name="T42">Otherwise, you don’t need them.</text:span></text:p>
      <text:p text:style-name="P25"/>
      <text:p text:style-name="P26"><text:span text:style-name="T43"><text:tab/>As</text:span> I do not own a Mac, only PC / Windows is supported. The plugin was tested on <text:tab/>Windows 11 22H2, FL Studio 25, Ableton Live 11, <text:span text:style-name="T44">and using Tracktion’s pluginval.</text:span></text:p>
      <text:list text:style-name="L4">
        <text:list-item>
          <text:list>
            <text:list-item>
              <text:p text:style-name="P27"><text:span text:style-name="T45">Download</text:span><text:span text:style-name="T46"> the </text:span><text:span text:style-name="T47">zip file </text:span><text:span text:style-name="T48">and extract it (you did this already).</text:span></text:p>
            </text:list-item>
            <text:list-item>
              <text:p text:style-name="P27"><text:span text:style-name="T45">Copy</text:span><text:span text:style-name="T46"> the .</text:span><text:span text:style-name="T47">vst3</text:span><text:span text:style-name="T46"> file into your system's VST3 folder. Usually, this is: </text:span></text:p>
              <text:list>
                <text:list-header>
                  <text:p text:style-name="P27"><text:soft-page-break/><text:span text:style-name="Source_20_Text"><text:span text:style-name="T46">C:\Program Files\Common Files\VST3</text:span></text:span></text:p>
                </text:list-header>
              </text:list>
            </text:list-item>
            <text:list-item>
              <text:p text:style-name="P28"><text:span text:style-name="T18">Rescan</text:span> your DAW’<text:span text:style-name="T49">s plugin library</text:span> (FL Studio, Ableton Live, etc.). The plugin should appear under the "Effects" or "Filter" category.</text:p>
            </text:list-item>
            <text:list-item>
              <text:p text:style-name="P29">Add it to a mixer track, to which sound is routed.</text:p>
            </text:list-item>
          </text:list>
        </text:list-item>
      </text:list>
      <text:p text:style-name="P16"/>
      <text:p text:style-name="P30">explanations of the controls</text:p>
      <text:p text:style-name="P16"/>
      <text:list text:style-name="L5">
        <text:list-item>
          <text:p text:style-name="P31"><text:span text:style-name="T18">Min / Max Freq:</text:span> Sets the frequency range (the "window") in which the bandpass filter operates. When <text:span text:style-name="T18">Note Lock</text:span> is active, the filter will only choose notes within this specific range.</text:p>
        </text:list-item>
        <text:list-item>
          <text:p text:style-name="P31"><text:span text:style-name="T18">Stay:</text:span> Determines the "rhythmic clock" of the plugin. It defines how many seconds the filter remains at a specific frequency before moving to the next one.</text:p>
        </text:list-item>
        <text:list-item>
          <text:p text:style-name="P31"><text:span text:style-name="T18">Glide:</text:span> Controls the transition speed <text:span text:style-name="T50">or smoothness</text:span> between <text:span text:style-name="T50">panning and </text:span>frequencies in <text:span text:style-name="T18">Random Mode</text:span>. In <text:span text:style-name="T18">Up/Down Mode</text:span>, this slider <text:span text:style-name="T50">only </text:span>controls the smoothness of the <text:span text:style-name="T18">Panning LFO</text:span>, while the filter jumps according to the Stay time.</text:p>
        </text:list-item>
        <text:list-item>
          <text:p text:style-name="P31"><text:span text:style-name="T18">Width (Resonance):</text:span> <text:span text:style-name="T51">Changes </text:span>the bandwidth of the filter. Higher values result in a sharper, more resonant "peak" sound, while lower values sound more subtle. <text:span text:style-name="T52">Higher values might lead to overdrive, and sharp spikes in volume.</text:span></text:p>
        </text:list-item>
        <text:list-item>
          <text:p text:style-name="P32"><text:span text:style-name="T18">Panning &amp; Pan LFO:</text:span> <text:span text:style-name="T53">Two modes are possible.</text:span></text:p>
          <text:list>
            <text:list-item>
              <text:p text:style-name="P32">Manual Panning: Sets the static stereo position of the filter.</text:p>
            </text:list-item>
            <text:list-item>
              <text:p text:style-name="P31">Pan LFO Button: When active, the filter moves randomly through the stereo field. The movement is triggered by the "Stay" rhythm but smoothed by the "Glide" time.</text:p>
            </text:list-item>
          </text:list>
        </text:list-item>
        <text:list-item>
          <text:p text:style-name="P31"><text:span text:style-name="T18">Note Lock &amp; Keyboard:</text:span> When <text:span text:style-name="T18">Note Lock</text:span> is ON, the filter will only snap to the frequencies of the notes selected on the keyboard (C through B) <text:span text:style-name="T54">over all available octaves between the minimum and maximum chosen frequency.</text:span></text:p>
          <text:list>
            <text:list-item>
              <text:p text:style-name="P31">In <text:span text:style-name="T18">Up/Down Mode</text:span>, the filter will cycle through these notes in a musical sequence.</text:p>
            </text:list-item>
          </text:list>
        </text:list-item>
        <text:list-item>
          <text:p text:style-name="P33"><text:span text:style-name="T18">Dry/Wet &amp; Wet Gain:</text:span> </text:p>
          <text:list>
            <text:list-item>
              <text:p text:style-name="P33"><text:span text:style-name="T18">Dry/Wet:</text:span> Mixes the original signal with the filtered signal.</text:p>
            </text:list-item>
            <text:list-item>
              <text:p text:style-name="P31"><text:span text:style-name="T18">Wet Gain:</text:span> Allows you to compensate for volume changes caused by narrow filter settings.</text:p>
            </text:list-item>
          </text:list>
        </text:list-item>
      </text:list>
      <text:p text:style-name="P34"><draw:frame draw:style-name="fr1" draw:name="Image3 Copy 1" text:anchor-type="char" svg:x="-2cm" svg:y="-2cm" svg:width="21.001cm" svg:height="29.7cm" draw:z-index="1"><draw:image xlink:href="Pictures/1000000100000104000001E5E3A1B9D2.png" xlink:type="simple" xlink:show="embed" xlink:actuate="onLoad" draw:mime-type="image/png"/></draw:frame></text:p>
      <text:p text:style-name="P35">Many thanks to Google for their Gemini AI that was indispensable for me to grasp how JUCE and C++ programming even works. <text:span text:style-name="T55">It was a real time-saver, as I did not need to become an expert in all the details. The downside to that is of course that I’d still not be able to program a plugin without its help.</text:span></text:p>
      <text:p text:style-name="P36"><text:span text:style-name="T56">Fonts used in this Documentation: </text:span><text:span text:style-name="T57">Aquatico</text:span><text:span text:style-name="T56">, Bahnschrift, </text:span><text:span text:style-name="T58">Conthrax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quatico" svg:font-family="Aquatico" style:font-family-generic="modern" style:font-pitch="variable"/>
    <style:font-face style:name="Bahnschrift" svg:font-family="Bahnschrift"/>
    <style:font-face style:name="Bahnschrift1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3:52:07.277827600</meta:creation-date>
    <dc:date>2026-02-03T12:57:56.250939600</dc:date>
    <meta:editing-duration>PT1H41M37S</meta:editing-duration>
    <meta:editing-cycles>85</meta:editing-cycles>
    <meta:generator>LibreOffice/25.8.3.2$Windows_X86_64 LibreOffice_project/8ca8d55c161d602844f5428fa4b58097424e324e</meta:generator>
    <meta:print-date>2026-01-22T16:34:12.690564900</meta:print-date>
    <meta:printed-by>PDF files</meta:printed-by>
    <meta:document-statistic meta:table-count="0" meta:image-count="4" meta:object-count="0" meta:page-count="3" meta:paragraph-count="51" meta:word-count="957" meta:character-count="5440" meta:non-whitespace-character-count="4515"/>
  </office:meta>
</office:document-meta>
</file>