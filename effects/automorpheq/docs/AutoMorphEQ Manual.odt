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D800000355A3B6326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quatico" svg:font-family="Aquatico" style:font-family-generic="modern" style:font-pitch="variable"/>
    <style:font-face style:name="Bahnschrift" svg:font-family="Bahnschrift"/>
    <style:font-face style:name="Bahnschrift1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quatico" fo:font-size="32pt" officeooo:rsid="000c0540" officeooo:paragraph-rsid="000c0540" style:font-size-asian="32pt" style:font-size-complex="32pt"/>
    </style:style>
    <style:style style:name="P2" style:family="paragraph" style:parent-style-name="Standard">
      <style:text-properties style:font-name="Aquatico" fo:font-size="12pt" officeooo:rsid="000c0540" officeooo:paragraph-rsid="000c0540" style:font-size-asian="10.5pt" style:font-size-complex="12pt"/>
    </style:style>
    <style:style style:name="P3" style:family="paragraph">
      <style:paragraph-properties fo:text-align="center"/>
    </style:style>
    <style:style style:name="P4" style:family="paragraph" style:parent-style-name="Standard">
      <style:text-properties style:font-name="Aquatico" fo:font-size="12pt" officeooo:rsid="0033d260" officeooo:paragraph-rsid="000c0540" style:font-size-asian="10.5pt" style:font-size-complex="12pt"/>
    </style:style>
    <style:style style:name="P5" style:family="paragraph" style:parent-style-name="Standard">
      <style:text-properties style:font-name="Aquatico" fo:font-size="12pt" officeooo:rsid="0033d260" officeooo:paragraph-rsid="0033d260" style:font-size-asian="10.5pt" style:font-size-complex="12pt"/>
    </style:style>
    <style:style style:name="P6" style:family="paragraph" style:parent-style-name="Text_20_body">
      <style:text-properties officeooo:paragraph-rsid="004026ca"/>
    </style:style>
    <style:style style:name="P7" style:family="paragraph" style:parent-style-name="Text_20_body">
      <style:text-properties fo:color="#999999" loext:opacity="100%" style:font-name="Bahnschrift1" fo:font-size="9pt" officeooo:rsid="0061e8ce" officeooo:paragraph-rsid="004026ca" style:font-size-asian="9pt" style:font-size-complex="9pt"/>
    </style:style>
    <style:style style:name="P8" style:family="paragraph" style:parent-style-name="Standard">
      <style:paragraph-properties fo:break-before="page"/>
      <style:text-properties style:font-name="Bahnschrift1" fo:font-size="12pt" officeooo:rsid="000d0e80" officeooo:paragraph-rsid="000d0e80" style:font-size-asian="10.5pt" style:font-size-complex="12pt"/>
    </style:style>
    <style:style style:name="P9" style:family="paragraph" style:parent-style-name="Standard">
      <style:text-properties style:font-name="Bahnschrift1" fo:font-size="12pt" officeooo:rsid="000d0e80" officeooo:paragraph-rsid="000d0e80" style:font-size-asian="10.5pt" style:font-size-complex="12pt"/>
    </style:style>
    <style:style style:name="P10" style:family="paragraph" style:parent-style-name="Standard">
      <style:text-properties style:font-name="Bahnschrift" officeooo:paragraph-rsid="00697eca"/>
    </style:style>
    <style:style style:name="P11" style:family="paragraph" style:parent-style-name="Standard">
      <style:text-properties style:font-name="Bahnschrift" fo:font-size="12pt" officeooo:rsid="00697eca" officeooo:paragraph-rsid="00697eca" style:font-size-asian="10.5pt" style:font-size-complex="12pt"/>
    </style:style>
    <style:style style:name="P12" style:family="paragraph" style:parent-style-name="Standard">
      <style:text-properties style:font-name="Bahnschrift" officeooo:paragraph-rsid="000d0e80"/>
    </style:style>
    <style:style style:name="P13" style:family="paragraph" style:parent-style-name="Standard">
      <style:text-properties style:font-name="Bahnschrift" officeooo:rsid="002d892b" officeooo:paragraph-rsid="002d892b"/>
    </style:style>
    <style:style style:name="P14" style:family="paragraph" style:parent-style-name="Standard">
      <style:text-properties style:font-name="Bahnschrift1" fo:font-style="normal" officeooo:rsid="005cba2a" officeooo:paragraph-rsid="005cba2a" style:font-style-asian="normal" style:font-style-complex="normal"/>
    </style:style>
    <style:style style:name="P15" style:family="paragraph" style:parent-style-name="Text_20_body">
      <style:text-properties style:font-name="Aquatico" fo:font-size="18pt" style:text-underline-style="solid" style:text-underline-width="auto" style:text-underline-color="font-color" officeooo:rsid="001fcb9b" officeooo:paragraph-rsid="005fc839" style:font-size-asian="18pt" style:font-size-complex="18pt"/>
    </style:style>
    <style:style style:name="P16" style:family="paragraph" style:parent-style-name="Standard">
      <style:text-properties style:font-name="Bahnschrift1" fo:font-size="12pt" style:text-underline-style="none" officeooo:rsid="001fcb9b" officeooo:paragraph-rsid="005fc839" style:font-size-asian="10.5pt" style:font-size-complex="12pt"/>
    </style:style>
    <style:style style:name="P17" style:family="paragraph" style:parent-style-name="Text_20_body">
      <style:text-properties style:font-name="Bahnschrift1" fo:font-size="12pt" officeooo:rsid="0025d022" officeooo:paragraph-rsid="005fc839" style:font-size-asian="12pt" style:font-size-complex="12pt"/>
    </style:style>
    <style:style style:name="P18" style:family="paragraph" style:parent-style-name="Text_20_body" style:list-style-name="L1">
      <style:text-properties style:font-name="Aquatico" officeooo:rsid="0012032a" officeooo:paragraph-rsid="005fc839"/>
    </style:style>
    <style:style style:name="P19" style:family="paragraph" style:parent-style-name="Text_20_body" style:list-style-name="L1">
      <style:text-properties style:font-name="Bahnschrift1" fo:font-size="12pt" officeooo:rsid="0012032a" officeooo:paragraph-rsid="005fc839" style:font-size-asian="12pt" style:font-size-complex="12pt"/>
    </style:style>
    <style:style style:name="P20" style:family="paragraph" style:parent-style-name="Text_20_body" style:list-style-name="L1">
      <style:text-properties style:font-name="Bahnschrift1" fo:font-size="12pt" officeooo:rsid="0023fca2" officeooo:paragraph-rsid="005fc839" style:font-size-asian="12pt" style:font-size-complex="12pt"/>
    </style:style>
    <style:style style:name="P21" style:family="paragraph" style:parent-style-name="Standard">
      <style:text-properties style:font-name="Aquatico" officeooo:rsid="0012032a" officeooo:paragraph-rsid="0012032a"/>
    </style:style>
    <style:style style:name="P22" style:family="paragraph" style:parent-style-name="Standard">
      <style:text-properties style:font-name="Aquatico" fo:font-size="18pt" fo:font-style="normal" style:text-underline-style="solid" style:text-underline-width="auto" style:text-underline-color="font-color" officeooo:rsid="0012032a" officeooo:paragraph-rsid="00697eca" style:font-size-asian="18pt" style:font-style-asian="normal" style:font-size-complex="18pt" style:font-style-complex="normal"/>
    </style:style>
    <style:style style:name="P23" style:family="paragraph" style:parent-style-name="Standard">
      <style:text-properties style:font-name="Bahnschrift" officeooo:rsid="00697eca" officeooo:paragraph-rsid="00697eca"/>
    </style:style>
    <style:style style:name="P24" style:family="paragraph" style:parent-style-name="Text_20_body" style:list-style-name="L2">
      <style:text-properties style:font-name="Bahnschrift" officeooo:rsid="00697eca" officeooo:paragraph-rsid="00697eca"/>
    </style:style>
    <style:style style:name="P25" style:family="paragraph" style:parent-style-name="Text_20_body">
      <style:text-properties fo:color="#2a9cec" loext:opacity="100%" style:font-name="Bahnschrift1" fo:font-size="9pt" officeooo:rsid="002b4df7" officeooo:paragraph-rsid="002b4df7" style:font-size-asian="9pt" style:font-size-complex="9pt"/>
    </style:style>
    <style:style style:name="T1" style:family="text">
      <style:text-properties officeooo:rsid="006b39ff"/>
    </style:style>
    <style:style style:name="T2" style:family="text">
      <style:text-properties fo:color="#2a9cec" loext:opacity="100%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9pt" fo:font-style="italic" fo:font-weight="bold" officeooo:rsid="00643adb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2a9cec" loext:opacity="100%" fo:font-family="'Conthrax Sb'" style:font-family-generic="swiss" style:font-pitch="variabl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2a9cec" loext:opacity="100%" fo:font-family="'Conthrax Sb'" style:font-family-generic="swiss" style:font-pitch="variable" fo:font-size="12pt" fo:font-style="normal" fo:font-weight="normal" officeooo:rsid="0032f932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999999" loext:opacity="100%" style:font-name="Bahnschrift1" fo:font-size="9pt" fo:font-weight="bold" officeooo:rsid="0034ecce" style:font-size-asian="9pt" style:font-size-complex="9pt"/>
    </style:style>
    <style:style style:name="T9" style:family="text">
      <style:text-properties fo:color="#999999" loext:opacity="100%" style:font-name="Bahnschrift1" fo:font-size="9pt" fo:font-weight="bold" officeooo:rsid="003a56ce" style:font-size-asian="9pt" style:font-size-complex="9pt"/>
    </style:style>
    <style:style style:name="T10" style:family="text">
      <style:text-properties fo:color="#999999" loext:opacity="100%" style:font-name="Bahnschrift1" fo:font-size="9pt" officeooo:rsid="0034ecce" style:font-size-asian="9pt" style:font-size-complex="9pt"/>
    </style:style>
    <style:style style:name="T11" style:family="text">
      <style:text-properties fo:color="#999999" loext:opacity="100%" style:font-name="Bahnschrift1" fo:font-size="9pt" officeooo:rsid="003a56ce" style:font-size-asian="9pt" style:font-size-complex="9pt"/>
    </style:style>
    <style:style style:name="T12" style:family="text">
      <style:text-properties fo:color="#999999" loext:opacity="100%" style:font-name="Bahnschrift1" fo:font-size="9pt" officeooo:rsid="0054d7c7" style:font-size-asian="9pt" style:font-size-complex="9pt"/>
    </style:style>
    <style:style style:name="T13" style:family="text">
      <style:text-properties officeooo:rsid="00697eca"/>
    </style:style>
    <style:style style:name="T14" style:family="text">
      <style:text-properties officeooo:rsid="000f5226"/>
    </style:style>
    <style:style style:name="T15" style:family="text">
      <style:text-properties officeooo:rsid="000fcc38"/>
    </style:style>
    <style:style style:name="T16" style:family="text">
      <style:text-properties fo:font-size="12pt" officeooo:rsid="000d0e80" style:font-size-asian="10.5pt" style:font-size-complex="12pt"/>
    </style:style>
    <style:style style:name="T17" style:family="text">
      <style:text-properties fo:font-size="12pt" officeooo:rsid="00697eca" style:font-size-asian="10.5pt" style:font-size-complex="12pt"/>
    </style:style>
    <style:style style:name="T18" style:family="text">
      <style:text-properties fo:font-size="12pt" officeooo:rsid="000f5226" style:font-size-asian="10.5pt" style:font-size-complex="12pt"/>
    </style:style>
    <style:style style:name="T19" style:family="text">
      <style:text-properties officeooo:rsid="004dba66"/>
    </style:style>
    <style:style style:name="T20" style:family="text">
      <style:text-properties officeooo:rsid="002ed70e"/>
    </style:style>
    <style:style style:name="T21" style:family="text">
      <style:text-properties fo:font-weight="bold" officeooo:rsid="002ed70e" style:font-weight-asian="bold" style:font-weight-complex="bold"/>
    </style:style>
    <style:style style:name="T22" style:family="text">
      <style:text-properties officeooo:rsid="0063d0eb"/>
    </style:style>
    <style:style style:name="T23" style:family="text">
      <style:text-properties style:text-underline-style="none"/>
    </style:style>
    <style:style style:name="T24" style:family="text">
      <style:text-properties officeooo:rsid="00651afd"/>
    </style:style>
    <style:style style:name="T25" style:family="text">
      <style:text-properties style:font-name="Bahnschrift1" fo:font-size="12pt" fo:font-weight="bold" style:font-size-asian="12pt" style:font-size-complex="12pt"/>
    </style:style>
    <style:style style:name="T26" style:family="text">
      <style:text-properties style:font-name="Bahnschrift1" fo:font-size="12pt" style:font-size-asian="12pt" style:font-size-complex="12pt"/>
    </style:style>
    <style:style style:name="T27" style:family="text">
      <style:text-properties style:font-name="Bahnschrift1" fo:font-size="12pt" officeooo:rsid="00235970" style:font-size-asian="12pt" style:font-size-complex="12pt"/>
    </style:style>
    <style:style style:name="T28" style:family="text">
      <style:text-properties style:font-name="Bahnschrift1" fo:font-size="12pt" officeooo:rsid="002ed70e" style:font-size-asian="12pt" style:font-size-complex="12pt"/>
    </style:style>
    <style:style style:name="T29" style:family="text">
      <style:text-properties style:font-name="Bahnschrift1" fo:font-size="12pt" officeooo:rsid="00697eca" style:font-size-asian="12pt" style:font-size-complex="12pt"/>
    </style:style>
    <style:style style:name="T30" style:family="text">
      <style:text-properties fo:font-weight="bold"/>
    </style:style>
    <style:style style:name="T31" style:family="text">
      <style:text-properties officeooo:rsid="00235970"/>
    </style:style>
    <style:style style:name="T32" style:family="text">
      <style:text-properties officeooo:rsid="0056bda3"/>
    </style:style>
    <style:style style:name="T33" style:family="text">
      <style:text-properties officeooo:rsid="002971c9"/>
    </style:style>
    <style:style style:name="T34" style:family="text">
      <style:text-properties style:font-name="Aquatico" officeooo:rsid="002971c9"/>
    </style:style>
    <style:style style:name="T35" style:family="text">
      <style:text-properties fo:font-family="'Conthrax Sb'" style:font-family-generic="swiss" style:font-pitch="variable" officeooo:rsid="002971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tomorph EQ</text:span> <text:span text:style-name="T2">VST</text:span> </text:p>
      <text:p text:style-name="P1"><text:tab/><text:tab/><text:span text:style-name="T3">Manual </text:span><text:span text:style-name="T4">for Windows</text:span><text:span text:style-name="T5"><text:tab/></text:span><text:span text:style-name="T6">by aquanode </text:span><text:span text:style-name="T7">(2026)</text:span></text:p>
      <text:p text:style-name="P2"><draw:line text:anchor-type="paragraph" draw:z-index="0" draw:name="Line 1" draw:style-name="gr1" draw:text-style-name="P3" svg:x1="-1.11cm" svg:y1="0.344cm" svg:x2="17.326cm" svg:y2="0.345cm"><text:p/></draw:line></text:p>
      <text:p text:style-name="P4"/>
      <text:p text:style-name="P5"><draw:frame draw:style-name="fr1" draw:name="Image1" text:anchor-type="char" svg:width="17cm" svg:height="11.695cm" draw:z-index="1"><draw:image xlink:href="Pictures/10000001000004D800000355A3B63265.png" xlink:type="simple" xlink:show="embed" xlink:actuate="onLoad" draw:mime-type="image/png"/></draw:frame></text:p>
      <text:p text:style-name="P5"/>
      <text:p text:style-name="P6"><text:span text:style-name="T8">Personal / </text:span><text:span text:style-name="T9">Copyright </text:span><text:span text:style-name="T8">Message:</text:span><text:span text:style-name="T10"> <text:tab/></text:span><text:span text:style-name="T11">T</text:span><text:span text:style-name="T10">his plugin is a passion project </text:span><text:span text:style-name="T12">for the community.</text:span><text:span text:style-name="T10"> </text:span></text:p>
      <text:p text:style-name="P7"><text:tab/><text:tab/><text:tab/><text:tab/><text:span text:style-name="T13">It is completely free and open source!</text:span></text:p>
      <text:p text:style-name="P7"><text:tab/><text:tab/><text:tab/><text:tab/><text:span text:style-name="T13">Feel free to use it in your own projects, modify the source code and whatever.</text:span></text:p>
      <text:p text:style-name="P7"><text:tab/><text:tab/><text:tab/><text:tab/><text:span text:style-name="T13">You may use the code and setup in your own paid projects, but you may not simply <text:tab/><text:tab/><text:tab/><text:tab/>re-upload my plugin and charge money for it unaltered.</text:span></text:p>
      <text:p text:style-name="P8">T<text:span text:style-name="T14">hank you for your interest in my </text:span><text:span text:style-name="T13">4th</text:span><text:span text:style-name="T14"> VST plugin, which I built with JUCE/</text:span><text:span text:style-name="T15">Visual Code C++.</text:span></text:p>
      <text:p text:style-name="P9"/>
      <text:p text:style-name="P10"><text:span text:style-name="T16">“</text:span><text:span text:style-name="T17">AutoMorphEQ</text:span><text:span text:style-name="T18">” is, as the name suggests, </text:span><text:span text:style-name="T17">a morphing equalizer where you can specify start and endpoints of a bell filter, and the speed at which it oscillates between these points.</text:span></text:p>
      <text:p text:style-name="P11"/>
      <text:p text:style-name="P10"><text:span text:style-name="T17">I highly recommend using FL Studio with this plugin, as FL Studio can Randomize all parameters at once to create interesting results you usually would not manually create.</text:span> </text:p>
      <text:p text:style-name="P12"/>
      <text:p text:style-name="P13">It is a VST equivalent of some earlie<text:span text:style-name="T13">r </text:span>filter effects I created in FL Studio’s Patcher for example, <text:span text:style-name="T19">that are </text:span><text:span text:style-name="T13">also</text:span><text:span text:style-name="T19"> free to download on </text:span><text:a xlink:type="simple" xlink:href="http://aquanode.gumroad.com/" text:style-name="Internet_20_link" text:visited-style-name="Visited_20_Internet_20_Link"><text:span text:style-name="T19">aquanode.gumroad.com</text:span></text:a><text:span text:style-name="T19">.</text:span></text:p>
      <text:p text:style-name="P14"/>
      <text:p text:style-name="P15">How to install</text:p>
      <text:p text:style-name="P16"><text:span text:style-name="T20"><text:tab/>Next to the .vst3 and this pdf, you will find 4 files with endings .h and .cpp in this <text:tab/>folder. These make up the </text:span><text:span text:style-name="T21">complete source code for JUCE</text:span><text:span text:style-name="T20">, so you can compile and <text:tab/>remake the whole effect plugin yourself if you like. </text:span><text:span text:style-name="T22">Otherwise, you don’t need them.</text:span></text:p>
      <text:p text:style-name="P16"/>
      <text:p text:style-name="P17"><text:span text:style-name="T23"><text:tab/>As</text:span> I do not own a Mac, only PC / Windows is supported. The plugin was tested on <text:tab/>Windows 11 22H2, FL Studio 25, Ableton Live 11, <text:span text:style-name="T24">and using Tracktion’s pluginval.</text:span></text:p>
      <text:list text:style-name="L1">
        <text:list-item>
          <text:list>
            <text:list-item>
              <text:p text:style-name="P18"><text:span text:style-name="T25">Download</text:span><text:span text:style-name="T26"> the </text:span><text:span text:style-name="T27">zip file </text:span><text:span text:style-name="T28">and extract it (you did this already).</text:span></text:p>
            </text:list-item>
            <text:list-item>
              <text:p text:style-name="P18"><text:span text:style-name="T25">Copy</text:span><text:span text:style-name="T26"> the </text:span><text:span text:style-name="T29">whole </text:span><text:span text:style-name="T26">.</text:span><text:span text:style-name="T27">vst3</text:span><text:span text:style-name="T26"> </text:span><text:span text:style-name="T29">folder</text:span><text:span text:style-name="T26"> into your system's VST3 folder. Usually, this is: </text:span></text:p>
              <text:list>
                <text:list-header>
                  <text:p text:style-name="P18"><text:span text:style-name="Source_20_Text"><text:span text:style-name="T26">C:\Program Files\Common Files\VST3 </text:span></text:span><text:span text:style-name="Source_20_Text"><text:span text:style-name="T29">or subfolders in here.</text:span></text:span></text:p>
                </text:list-header>
              </text:list>
            </text:list-item>
            <text:list-item>
              <text:p text:style-name="P19"><text:span text:style-name="T30">Rescan</text:span> your DAW’<text:span text:style-name="T31">s plugin library</text:span> (FL Studio, Ableton Live, etc.). The plugin should appear under the "Effects" or "<text:span text:style-name="T13">EQ</text:span>" category.</text:p>
            </text:list-item>
            <text:list-item>
              <text:p text:style-name="P20">Add it to a mixer track, to which sound is routed.</text:p>
            </text:list-item>
          </text:list>
        </text:list-item>
      </text:list>
      <text:p text:style-name="P21"/>
      <text:p text:style-name="P22">explanations of the controls</text:p>
      <text:p text:style-name="P23"><text:tab/></text:p>
      <text:list text:style-name="L2">
        <text:list-item>
          <text:list>
            <text:list-item>
              <text:p text:style-name="P24">Start Frequency:<text:tab/>Frequency where the filter starts its sweep.</text:p>
            </text:list-item>
            <text:list-item>
              <text:p text:style-name="P24">End Frequency:<text:tab/>Frequency where the filter ends its sweep.</text:p>
            </text:list-item>
            <text:list-item>
              <text:p text:style-name="P24">Start Volume:<text:tab/>Volume at which the filter starts its sweep.</text:p>
            </text:list-item>
            <text:list-item>
              <text:p text:style-name="P24">End Volume:<text:tab/><text:tab/>Volume at which the filter ends its sweep.</text:p>
            </text:list-item>
            <text:list-item>
              <text:p text:style-name="P24">Q:<text:tab/><text:tab/><text:tab/>Width of the respective filter.</text:p>
            </text:list-item>
            <text:list-item>
              <text:p text:style-name="P24">Speed:<text:tab/><text:tab/>Speed at which the filter oscillates between start &amp; end.</text:p>
            </text:list-item>
            <text:list-item>
              <text:p text:style-name="P24">Position:<text:tab/><text:tab/><text:span text:style-name="T5">If speed is = 0 (refreshed), you can manually position the filter.</text:span></text:p>
            </text:list-item>
            <text:list-item>
              <text:p text:style-name="P24">Wet Only:<text:tab/><text:tab/>Cancels the original sound (Button on the top right).</text:p>
            </text:list-item>
          </text:list>
        </text:list-item>
      </text:list>
      <text:p text:style-name="P25">Many thanks to Google for their Gemini AI that was indispensable for me to grasp how JUCE and C++ programming even works. <text:span text:style-name="T32">It was a real time-saver, as I did not need to become an expert in all the details. The downside to that is of course that I’d still not be able to program a plugin without its help. </text:span><text:span text:style-name="T33">Fonts used in this Documentation: </text:span><text:span text:style-name="T34">Aquatico</text:span><text:span text:style-name="T33">, Bahnschrift, </text:span><text:span text:style-name="T35">Conthrax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quatico" svg:font-family="Aquatico" style:font-family-generic="modern" style:font-pitch="variable"/>
    <style:font-face style:name="Bahnschrift" svg:font-family="Bahnschrift"/>
    <style:font-face style:name="Bahnschrift1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3:52:07.277827600</meta:creation-date>
    <dc:date>2026-01-27T13:22:27.001040300</dc:date>
    <meta:editing-duration>PT1H47M5S</meta:editing-duration>
    <meta:editing-cycles>86</meta:editing-cycles>
    <meta:generator>LibreOffice/25.8.3.2$Windows_X86_64 LibreOffice_project/8ca8d55c161d602844f5428fa4b58097424e324e</meta:generator>
    <meta:print-date>2026-01-22T16:34:12.690564900</meta:print-date>
    <meta:printed-by>PDF files</meta:printed-by>
    <meta:document-statistic meta:table-count="0" meta:image-count="1" meta:object-count="0" meta:page-count="2" meta:paragraph-count="29" meta:word-count="478" meta:character-count="2694" meta:non-whitespace-character-count="2221"/>
  </office:meta>
</office:document-meta>
</file>