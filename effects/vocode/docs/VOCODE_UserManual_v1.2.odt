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15.452cm" fo:margin-left="0.004cm" fo:margin-top="0cm" fo:margin-bottom="0cm" table:align="left" style:writing-mode="page"/>
    </style:style>
    <style:style style:name="Table1.A" style:family="table-column">
      <style:table-column-properties style:column-width="4.233cm"/>
    </style:style>
    <style:style style:name="Table1.B" style:family="table-column">
      <style:table-column-properties style:column-width="2.469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e2010" fo:padding-left="0.212cm" fo:padding-right="0.212cm" fo:padding-top="0.141cm" fo:padding-bottom="0.141cm" fo:border="0.25pt solid #3e1e07">
        <style:background-image/>
      </style:table-cell-properties>
    </style:style>
    <style:style style:name="Table1.A2" style:family="table-cell">
      <style:table-cell-properties fo:background-color="#f9f3ec" fo:padding-left="0.212cm" fo:padding-right="0.212cm" fo:padding-top="0.106cm" fo:padding-bottom="0.106cm" fo:border="0.25pt solid #d0c0a8">
        <style:background-image/>
      </style:table-cell-properties>
    </style:style>
    <style:style style:name="Table1.A3" style:family="table-cell">
      <style:table-cell-properties fo:background-color="#f2e8d8" fo:padding-left="0.212cm" fo:padding-right="0.212cm" fo:padding-top="0.106cm" fo:padding-bottom="0.106cm" fo:border="0.25pt solid #d0c0a8">
        <style:background-image/>
      </style:table-cell-properties>
    </style:style>
    <style:style style:name="Table2" style:family="table">
      <style:table-properties style:width="10.583cm" fo:margin-left="0.004cm" fo:margin-top="0cm" fo:margin-bottom="0cm" table:align="left" style:writing-mode="page"/>
    </style:style>
    <style:style style:name="Table2.A" style:family="table-column">
      <style:table-column-properties style:column-width="2.6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e2010" fo:padding-left="0.176cm" fo:padding-right="0.176cm" fo:padding-top="0.106cm" fo:padding-bottom="0.106cm" fo:border="0.25pt solid #3e1e07">
        <style:background-image/>
      </style:table-cell-properties>
    </style:style>
    <style:style style:name="Table2.A2" style:family="table-cell">
      <style:table-cell-properties fo:background-color="#f9f3ec" fo:padding-left="0.176cm" fo:padding-right="0.176cm" fo:padding-top="0.106cm" fo:padding-bottom="0.106cm" fo:border="0.25pt solid #d0c0a8">
        <style:background-image/>
      </style:table-cell-properties>
    </style:style>
    <style:style style:name="Table2.A3" style:family="table-cell">
      <style:table-cell-properties fo:background-color="#f2e8d8" fo:padding-left="0.176cm" fo:padding-right="0.176cm" fo:padding-top="0.106cm" fo:padding-bottom="0.106cm" fo:border="0.25pt solid #d0c0a8">
        <style:background-image/>
      </style:table-cell-properties>
    </style:style>
    <style:style style:name="P1" style:family="paragraph" style:parent-style-name="Standard">
      <style:paragraph-properties fo:margin-top="0.847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  <style:text-properties fo:color="#b5601c" loext:opacity="100%" fo:font-size="18pt" fo:font-style="italic" style:font-name-asian="Arial2" style:font-size-asian="18pt" style:font-style-asian="italic" style:font-name-complex="Arial2" style:font-size-complex="18pt" style:font-style-complex="italic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 fo:padding-left="0cm" fo:padding-right="0cm" fo:padding-top="0cm" fo:padding-bottom="0.282cm" fo:border-left="none" fo:border-right="none" fo:border-top="none" fo:border-bottom="0.74pt solid #e8a84a"/>
      <style:text-properties fo:color="#6b4a25" loext:opacity="100%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top="0cm" fo:margin-bottom="0.635cm" style:contextual-spacing="false"/>
    </style:style>
    <style:style style:name="P5" style:family="paragraph" style:parent-style-name="Heading_20_1">
      <style:paragraph-properties fo:margin-left="0cm" fo:margin-top="0.635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74pt solid #b5601c"/>
    </style:style>
    <style:style style:name="P6" style:family="paragraph" style:parent-style-name="Standard">
      <style:paragraph-properties fo:margin-top="0.141cm" fo:margin-bottom="0.212cm" style:contextual-spacing="false"/>
    </style:style>
    <style:style style:name="P7" style:family="paragraph" style:parent-style-name="Standard">
      <style:paragraph-properties fo:margin-top="0.141cm" fo:margin-bottom="0.212cm" style:contextual-spacing="false"/>
      <style:text-properties fo:color="#3e1e07" loext:opacity="100%" style:font-name="Arial1" fo:font-size="14pt" fo:font-weight="bold" officeooo:rsid="00215bce" officeooo:paragraph-rsid="00215bce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41cm" fo:margin-bottom="0.212cm" style:contextual-spacing="false"/>
      <style:text-properties fo:color="#1a1208" loext:opacity="100%" fo:font-size="11pt" officeooo:rsid="00215bce" officeooo:paragraph-rsid="002209ca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.141cm" fo:margin-bottom="0.212cm" style:contextual-spacing="false"/>
      <style:text-properties fo:color="#1a1208" loext:opacity="100%" fo:font-size="11pt" officeooo:rsid="00215bce" officeooo:paragraph-rsid="00243d1b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top="0.141cm" fo:margin-bottom="0.212cm" style:contextual-spacing="false"/>
      <style:text-properties fo:color="#1a1208" loext:opacity="100%" fo:font-size="11pt" officeooo:rsid="0023af68" officeooo:paragraph-rsid="00243d1b" style:font-name-asian="Arial2" style:font-size-asian="11pt" style:font-name-complex="Arial2" style:font-size-complex="11pt"/>
    </style:style>
    <style:style style:name="P11" style:family="paragraph" style:parent-style-name="Standard">
      <style:paragraph-properties fo:margin-top="0.141cm" fo:margin-bottom="0.212cm" style:contextual-spacing="false"/>
      <style:text-properties fo:color="#1a1208" loext:opacity="100%" fo:font-size="11pt" officeooo:rsid="00215bce" officeooo:paragraph-rsid="00215bce" style:font-name-asian="Arial2" style:font-size-asian="11pt" style:font-name-complex="Arial2" style:font-size-complex="11pt"/>
    </style:style>
    <style:style style:name="P12" style:family="paragraph" style:parent-style-name="Heading_20_1">
      <style:paragraph-properties fo:margin-left="0cm" fo:margin-top="0.635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74pt solid #b5601c"/>
      <style:text-properties fo:color="#3e1e07" loext:opacity="100%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Heading_20_2">
      <style:paragraph-properties fo:margin-left="0cm" fo:margin-top="0.423cm" fo:margin-bottom="0.141cm" style:contextual-spacing="false" fo:text-indent="0cm" style:auto-text-indent="false"/>
    </style:style>
    <style:style style:name="P14" style:family="paragraph" style:parent-style-name="List_20_Paragraph" style:list-style-name="WWNum3">
      <style:paragraph-properties fo:margin-top="0.106cm" fo:margin-bottom="0.106cm" style:contextual-spacing="false"/>
    </style:style>
    <style:style style:name="P15" style:family="paragraph" style:parent-style-name="List_20_Paragraph" style:list-style-name="WWNum2">
      <style:paragraph-properties fo:margin-top="0.106cm" fo:margin-bottom="0.106cm" style:contextual-spacing="false"/>
    </style:style>
    <style:style style:name="P16" style:family="paragraph" style:parent-style-name="Standard">
      <style:paragraph-properties fo:margin-top="0cm" fo:margin-bottom="0.212cm" style:contextual-spacing="false"/>
    </style:style>
    <style:style style:name="P17" style:family="paragraph" style:parent-style-name="Standard">
      <style:paragraph-properties fo:margin-left="0.776cm" fo:margin-right="0.776cm" fo:margin-top="0.176cm" fo:margin-bottom="0.176cm" style:contextual-spacing="false" fo:padding-left="0.282cm" fo:padding-right="0cm" fo:padding-top="0cm" fo:padding-bottom="0cm" fo:border-left="0.99pt solid #e8a84a" fo:border-right="none" fo:border-top="none" fo:border-bottom="none"/>
    </style:style>
    <style:style style:name="P18" style:family="paragraph" style:parent-style-name="Standard">
      <style:paragraph-properties fo:margin-top="0cm" fo:margin-bottom="0.212cm" style:contextual-spacing="false"/>
      <style:text-properties fo:color="#1a1208" loext:opacity="100%" style:font-name="Arial1" fo:font-size="11pt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top="0cm" fo:margin-bottom="0.423cm" style:contextual-spacing="false"/>
    </style:style>
    <style:style style:name="P20" style:family="paragraph" style:parent-style-name="Heading_20_3">
      <style:paragraph-properties fo:margin-left="0cm" fo:margin-top="0.282cm" fo:margin-bottom="0.106cm" style:contextual-spacing="false" fo:text-indent="0cm" style:auto-text-indent="false"/>
    </style:style>
    <style:style style:name="P21" style:family="paragraph" style:parent-style-name="Standard">
      <style:paragraph-properties fo:margin-top="0.141cm" fo:margin-bottom="0.212cm" style:contextual-spacing="false"/>
      <style:text-properties fo:color="#1a1208" loext:opacity="100%" fo:font-size="11pt" style:font-name-asian="Arial2" style:font-size-asian="11pt" style:font-name-complex="Arial2" style:font-size-complex="11pt"/>
    </style:style>
    <style:style style:name="P22" style:family="paragraph" style:parent-style-name="Standard">
      <style:paragraph-properties fo:margin-top="0.141cm" fo:margin-bottom="0.212cm" style:contextual-spacing="false"/>
      <style:text-properties fo:color="#1a1208" loext:opacity="100%" style:font-name="Arial1" fo:font-size="11pt" style:font-name-asian="Arial2" style:font-size-asian="11pt" style:font-name-complex="Arial2" style:font-size-complex="11pt"/>
    </style:style>
    <style:style style:name="P23" style:family="paragraph" style:parent-style-name="Standard">
      <style:paragraph-properties fo:margin-top="0cm" fo:margin-bottom="0.212cm" style:contextual-spacing="false"/>
      <style:text-properties fo:color="#6b4a25" loext:opacity="100%" style:font-name="Arial1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24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5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6" style:family="paragraph" style:parent-style-name="Standard">
      <style:paragraph-properties fo:margin-top="0.141cm" fo:margin-bottom="0.212cm" style:contextual-spacing="false" fo:text-align="center" style:justify-single-word="false"/>
    </style:style>
    <style:style style:name="T1" style:family="text">
      <style:text-properties fo:color="#3e1e07" loext:opacity="100%" style:font-name="Arial1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3e1e07" loext:opacity="100%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3" style:family="text">
      <style:text-properties officeooo:rsid="002209ca"/>
    </style:style>
    <style:style style:name="T4" style:family="text">
      <style:text-properties fo:color="#3e1e07" loext:opacity="100%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fo:color="#1a1208" loext:opacity="100%" fo:font-size="11pt" style:font-name-asian="Arial2" style:font-size-asian="11pt" style:font-name-complex="Arial2" style:font-size-complex="11pt"/>
    </style:style>
    <style:style style:name="T6" style:family="text">
      <style:text-properties fo:color="#3e1e07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officeooo:rsid="002371a2"/>
    </style:style>
    <style:style style:name="T8" style:family="text">
      <style:text-properties officeooo:rsid="0023af68"/>
    </style:style>
    <style:style style:name="T9" style:family="text">
      <style:text-properties officeooo:rsid="00243d1b"/>
    </style:style>
    <style:style style:name="T10" style:family="text">
      <style:text-properties fo:color="#b5601c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3e1e07" loext:opacity="100%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fo:color="#1a1208" loext:opacity="100%" style:font-name="Arial1" fo:font-size="11pt" style:font-name-asian="Arial2" style:font-size-asian="11pt" style:font-name-complex="Arial2" style:font-size-complex="11pt"/>
    </style:style>
    <style:style style:name="T13" style:family="text">
      <style:text-properties fo:color="#6b4a25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4" style:family="text">
      <style:text-properties fo:color="#b5601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" style:family="text">
      <style:text-properties fo:color="#6b4a25" loext:opacity="100%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6" style:family="text">
      <style:text-properties fo:color="#ffffff" loext:opacity="100%" style:font-name="Arial1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7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8" style:family="text">
      <style:text-properties fo:color="#3e1e07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9" style:family="text">
      <style:text-properties fo:color="#1a1208" loext:opacity="100%" style:font-name="Arial1" fo:font-size="9pt" style:font-name-asian="Arial2" style:font-size-asian="9pt" style:font-name-complex="Arial2" style:font-size-complex="9pt"/>
    </style:style>
    <style:style style:name="T20" style:family="text">
      <style:text-properties fo:color="#1a1208" loext:opacity="100%" fo:font-size="9pt" style:font-name-asian="Arial2" style:font-size-asian="9pt" style:font-name-complex="Arial2" style:font-size-complex="9pt"/>
    </style:style>
    <style:style style:name="T21" style:family="text">
      <style:text-properties fo:color="#3e1e07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a1208" loext:opacity="100%" fo:font-size="11pt" officeooo:rsid="00215bce" style:font-name-asian="Arial2" style:font-size-asian="11pt" style:font-name-complex="Arial2" style:font-size-complex="11pt"/>
    </style:style>
    <style:style style:name="T23" style:family="text">
      <style:text-properties fo:color="#6b4a25" loext:opacity="100%" style:font-name="Arial1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24" style:family="text">
      <style:text-properties fo:color="#3e1e07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VOCODE</text:span><text:span text:style-name="T1"/></text:p>
      <text:p text:style-name="P2">256 Band-Vocoder Plugin</text:p>
      <text:p text:style-name="P3">User Manual <text:s/>· <text:s/>v1.<text:span text:style-name="T3">2 </text:span>· 256-band edition</text:p>
      <text:p text:style-name="P4"/>
      <text:h text:style-name="P5" text:outline-level="1" loext:marker-style-name="T4"><text:span text:style-name="T4">1. Introduction</text:span><text:span text:style-name="T4"/></text:h>
      <text:p text:style-name="P6"><text:span text:style-name="T5">VOCODE is a classic filter-bank vocoder plug-in built with the JUCE framework. It splits an audio signal into up to </text:span><text:span text:style-name="T6">256 frequency bands</text:span><text:span text:style-name="T5">, analyses the amplitude envelope of each band from a modulator source, and uses those envelopes to gate the same bands of a carrier signal. The result is the characteristic "talking synthesiser" effect, or without a sidechain a richly self-gated robotic texture.</text:span></text:p>
      <text:p text:style-name="P6"><text:span text:style-name="T5">Unlike modern FFT-based vocoders, VOCODE uses traditional </text:span><text:span text:style-name="T6">cascaded IIR biquad band-pass filters</text:span><text:span text:style-name="T5"> for its analysis and synthesis banks, and with 256 bands the most you’ll probably encounter. This gives it a warm, slightly coloured sound characteristic of hardware vocoders from the 1970s and 80s, while allowing individual band-widths to be sculpted in real time via the interactive display, perfect for explorative genres like atmospheric dub techno.</text:span></text:p>
      <text:p text:style-name="P7">Changelog:</text:p>
      <text:p text:style-name="P8">Version 1.<text:span text:style-name="T3">2</text:span>: <text:tab/><text:span text:style-name="T3">State Saving Bugfixes, </text:span><text:span text:style-name="T7">Added</text:span><text:span text:style-name="T3"> Preset Import / Export </text:span><text:span text:style-name="T8">and Randomize / Smooth Buttons,</text:span></text:p>
      <text:p text:style-name="P9"><text:span text:style-name="T8"><text:tab/><text:tab/>Start and End Frequency Sliders, </text:span><text:span text:style-name="T9">a Normalizer </text:span><text:span text:style-name="T8">and if you use exactly 133 bands they</text:span></text:p>
      <text:p text:style-name="P10"><text:tab/><text:tab/>can be tuned to 12TET from C-1 to C10 with the Chromatic Lock Toggle. </text:p>
      <text:p text:style-name="P11">Version 1.1: <text:tab/>Added more colorways, better visual response, and individual band volume editing.</text:p>
      <text:p text:style-name="P11">Version 1.0: <text:tab/>Initial Release</text:p>
      <text:h text:style-name="P12" text:outline-level="1">2. Signal Routing</text:h>
      <text:h text:style-name="P13" text:outline-level="2" loext:marker-style-name="T10"><text:span text:style-name="T10">2.1 Standard (Sidechain) Mode</text:span><text:span text:style-name="T10"/></text:h>
      <text:p text:style-name="P6"><text:span text:style-name="T5">In standard mode the plug-in uses </text:span><text:span text:style-name="T6">two input buses</text:span><text:span text:style-name="T5">:</text:span></text:p>
      <text:list xml:id="list2910896904" text:style-name="WWNum3">
        <text:list-item text:start-value="1">
          <text:p text:style-name="P14"><text:span text:style-name="T6">Bus 0 - Carrier: </text:span><text:span text:style-name="T5">The source whose timbre will be shaped.</text:span></text:p>
        </text:list-item>
        <text:list-item text:style-override="WWNum2">
          <text:p text:style-name="P15"><text:span text:style-name="T6">Bus 1 - Modulator (sidechain): </text:span><text:span text:style-name="T11">T</text:span><text:span text:style-name="T5">he (harmonically rich) signal whose spectral envelope is imprinted on the carrier. A microphone feed is a most common choice, but any signal with time-varying formants works well.</text:span></text:p>
        </text:list-item>
      </text:list>
      <text:p text:style-name="P6" loext:marker-style-name="T12"><text:span text:style-name="T5">Connect both buses in your host to engage standard vocoder mode. The modulator bus is marked as an optional input in the plug-in bus description, so hosts that do not support multi-input will still load the plug-in.</text:span><text:span text:style-name="T12"/></text:p>
      <text:h text:style-name="P13" text:outline-level="2" loext:marker-style-name="T10"><text:span text:style-name="T10">2.2 Auto-Vocode Mode</text:span><text:span text:style-name="T10"/></text:h>
      <text:p text:style-name="P6"><text:span text:style-name="T5">When </text:span><text:span text:style-name="T6">no sidechain bus is active, </text:span><text:span text:style-name="T5">either because the host has not connected a signal to Bus 1, or because the host exposes fewer than two input buses, VOCODE automatically switches to </text:span><text:span text:style-name="T6">auto-vocode mode</text:span><text:span text:style-name="T5">. In auto-vocode mode the carrier signal is used as its </text:span><text:span text:style-name="T13">own</text:span><text:span text:style-name="T5"> modulator. Each band gates itself by its own envelope: bands with energy open; silent bands close. The net effect is a </text:span><text:span text:style-name="T6">spectrally </text:span><text:soft-page-break/><text:span text:style-name="T6">focused, "robotic" self-vocoding, </text:span><text:span text:style-name="T5">the signal is chopped into frequency slices and each slice is amplitude-followed independently. Think of it as a very precise multi-band gate with an organic attack/release character.</text:span></text:p>
      <text:p text:style-name="P16"/>
      <text:p text:style-name="P16"/>
      <text:p text:style-name="P17"><text:span text:style-name="T14">Note <text:s/></text:span><text:span text:style-name="T15">The AUTO-VOCODE indicator in the top-right corner of the display lights up whenever the plug-in is running in auto-vocode mode. No action is required, the switch is fully automatic.</text:span></text:p>
      <text:p text:style-name="P18"/>
      <text:p text:style-name="P6" loext:marker-style-name="T12"><text:span text:style-name="T5">Useful things to feed into auto-vocode mode:</text:span><text:span text:style-name="T12"/></text:p>
      <text:list text:continue-list="list2910896904" text:style-name="WWNum2">
        <text:list-item>
          <text:p text:style-name="P15" loext:marker-style-name="T12"><text:span text:style-name="T5">A dense pad or string ensemble - bands with harmonic content stay open, gaps close, giving a gating/tremolo texture that tracks the harmonic rhythm of the source.</text:span><text:span text:style-name="T12"/></text:p>
        </text:list-item>
        <text:list-item>
          <text:p text:style-name="P15" loext:marker-style-name="T12"><text:span text:style-name="T5">A drum loop - the transient energy opens bands briefly, producing a percussive flutter on whatever is playing.</text:span><text:span text:style-name="T12"/></text:p>
        </text:list-item>
        <text:list-item>
          <text:p text:style-name="P15" loext:marker-style-name="T12"><text:span text:style-name="T5">A voice - gives a subtle telephony / talkbox timbre without a separate carrier.</text:span><text:span text:style-name="T12"/></text:p>
        </text:list-item>
      </text:list>
      <text:p text:style-name="P19"/>
      <text:h text:style-name="P5" text:outline-level="1" loext:marker-style-name="T4"><text:span text:style-name="T4">3. Controls</text:span><text:span text:style-name="T4"/></text:h>
      <text:h text:style-name="P13" text:outline-level="2" loext:marker-style-name="T10"><text:span text:style-name="T10">3.1 Knob Row</text:span><text:span text:style-name="T10"/></text:h>
      <text:p text:style-name="P6" loext:marker-style-name="T12"><text:span text:style-name="T5">Seven rotary knobs sit across the top of the plug-in window. All knobs respond to vertical mouse drag. Double-click to type a value. Right-click for the host automation menu.</text:span><text:span text:style-name="T12"/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Standard" loext:marker-style-name="T16"><text:span text:style-name="T17">PARAMETER</text:span><text:span text:style-name="T16"/></text:p>
            </table:table-cell>
            <table:table-cell table:style-name="Table1.A1" office:value-type="string">
              <text:p text:style-name="Standard" loext:marker-style-name="T16"><text:span text:style-name="T17">RANGE</text:span><text:span text:style-name="T16"/></text:p>
            </table:table-cell>
            <table:table-cell table:style-name="Table1.A1" office:value-type="string">
              <text:p text:style-name="Standard" loext:marker-style-name="T16"><text:span text:style-name="T17">DEFAULT</text:span><text:span text:style-name="T16"/></text:p>
            </table:table-cell>
            <table:table-cell table:style-name="Table1.A1" office:value-type="string">
              <text:p text:style-name="Standard" loext:marker-style-name="T16"><text:span text:style-name="T17">DESCRIPTION</text:span><text:span text:style-name="T16"/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 loext:marker-style-name="T18"><text:span text:style-name="T18">BANDS</text:span><text:span text:style-name="T18"/></text:p>
          </table:table-cell>
          <table:table-cell table:style-name="Table1.A2" office:value-type="string">
            <text:p text:style-name="Standard" loext:marker-style-name="T19"><text:span text:style-name="T20">1 – 256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16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Number of frequency bands. Bands are distributed logarithmically from 80 Hz to 12 kHz. Higher counts give finer spectral resolution but increase CPU cost linearly.</text:span><text:span text:style-name="T19"/></text:p>
          </table:table-cell>
        </table:table-row>
        <table:table-row table:style-name="Table1.1">
          <table:table-cell table:style-name="Table1.A3" office:value-type="string">
            <text:p text:style-name="Standard" loext:marker-style-name="T18"><text:span text:style-name="T18">ATTACK</text:span><text:span text:style-name="T18"/></text:p>
          </table:table-cell>
          <table:table-cell table:style-name="Table1.A3" office:value-type="string">
            <text:p text:style-name="Standard" loext:marker-style-name="T19"><text:span text:style-name="T20">1 – 500 ms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10 ms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Envelope follower attack time, per band. Faster attack captures transients more tightly but can introduce audible AM artefacts at low values (&lt; 3 ms).</text:span><text:span text:style-name="T19"/></text:p>
          </table:table-cell>
        </table:table-row>
        <table:table-row table:style-name="Table1.1">
          <table:table-cell table:style-name="Table1.A2" office:value-type="string">
            <text:p text:style-name="Standard" loext:marker-style-name="T18"><text:span text:style-name="T18">RELEASE</text:span><text:span text:style-name="T18"/></text:p>
          </table:table-cell>
          <table:table-cell table:style-name="Table1.A2" office:value-type="string">
            <text:p text:style-name="Standard" loext:marker-style-name="T19"><text:span text:style-name="T20">10 – 2000 ms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120 ms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Envelope follower release time, per band. Longer release smooths the gating effect; shorter release gives a more staccato, chattering character.</text:span><text:span text:style-name="T19"/></text:p>
          </table:table-cell>
        </table:table-row>
        <table:table-row table:style-name="Table1.1">
          <table:table-cell table:style-name="Table1.A3" office:value-type="string">
            <text:p text:style-name="Standard" loext:marker-style-name="T18"><text:span text:style-name="T18">BAND ORDER</text:span><text:span text:style-name="T18"/></text:p>
          </table:table-cell>
          <table:table-cell table:style-name="Table1.A3" office:value-type="string">
            <text:p text:style-name="Standard" loext:marker-style-name="T19"><text:span text:style-name="T20">1 – 4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1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Number of cascaded biquad stages per band. Higher order = steeper band-pass skirts = better channel separation. Each additional stage roughly halves cross-talk at the cost of slightly increased latency and CPU.</text:span><text:span text:style-name="T19"/></text:p>
          </table:table-cell>
        </table:table-row>
        <table:table-row table:style-name="Table1.1">
          <table:table-cell table:style-name="Table1.A2" office:value-type="string">
            <text:p text:style-name="Standard" loext:marker-style-name="T18"><text:span text:style-name="T18">COMP</text:span><text:span text:style-name="T18"/></text:p>
          </table:table-cell>
          <table:table-cell table:style-name="Table1.A2" office:value-type="string">
            <text:p text:style-name="Standard" loext:marker-style-name="T19"><text:span text:style-name="T20">0 – 1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0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Post-vocoder compressor amount. At 0 the compressor is bypassed. At 1 the ratio is 20:1 with a fixed −12 dBFS threshold and 10 dB make-up gain. Useful to tame level variance across different band counts.</text:span><text:span text:style-name="T19"/></text:p>
          </table:table-cell>
        </table:table-row>
        <text:soft-page-break/>
        <table:table-row table:style-name="Table1.1">
          <table:table-cell table:style-name="Table1.A3" office:value-type="string">
            <text:p text:style-name="Standard" loext:marker-style-name="T18"><text:span text:style-name="T18">DRY / WET</text:span><text:span text:style-name="T18"/></text:p>
          </table:table-cell>
          <table:table-cell table:style-name="Table1.A3" office:value-type="string">
            <text:p text:style-name="Standard" loext:marker-style-name="T19"><text:span text:style-name="T20">0 – 1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1 (wet)</text:span><text:span text:style-name="T19"/></text:p>
          </table:table-cell>
          <table:table-cell table:style-name="Table1.A3" office:value-type="string">
            <text:p text:style-name="Standard" loext:marker-style-name="T19"><text:span text:style-name="T20">Crossfade between the unprocessed carrier (dry) and the vocoded output (wet). At 0.5 both are summed at equal level. The dry signal is the carrier; the modulator is never audible in the dry path.</text:span><text:span text:style-name="T19"/></text:p>
          </table:table-cell>
        </table:table-row>
        <table:table-row table:style-name="Table1.1">
          <table:table-cell table:style-name="Table1.A2" office:value-type="string">
            <text:p text:style-name="Standard" loext:marker-style-name="T18"><text:span text:style-name="T18">GAIN</text:span><text:span text:style-name="T18"/></text:p>
          </table:table-cell>
          <table:table-cell table:style-name="Table1.A2" office:value-type="string">
            <text:p text:style-name="Standard" loext:marker-style-name="T19"><text:span text:style-name="T20">0 – +24 dB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0 dB</text:span><text:span text:style-name="T19"/></text:p>
          </table:table-cell>
          <table:table-cell table:style-name="Table1.A2" office:value-type="string">
            <text:p text:style-name="Standard" loext:marker-style-name="T19"><text:span text:style-name="T20">Output gain applied after the dry/wet blend. Use to compensate for the level reduction that results from a narrow bandwidth curve or a sparse modulator.</text:span><text:span text:style-name="T19"/></text:p>
          </table:table-cell>
        </table:table-row>
      </table:table>
      <text:p text:style-name="P19"/>
      <text:h text:style-name="P13" text:outline-level="2" loext:marker-style-name="T10"><text:span text:style-name="T10">3.2 Vocoder Display</text:span><text:span text:style-name="T10"/></text:h>
      <text:p text:style-name="P6"><text:span text:style-name="T5">The large panel below the knobs is the </text:span><text:span text:style-name="T6">vocoder display</text:span><text:span text:style-name="T5">. It always shows the live band-level bars, and overlays one of two editable curves depending on the active editing mode (toggled by the button in the top-left corner of the display):</text:span></text:p>
      <text:list text:continue-numbering="true" text:style-name="WWNum2">
        <text:list-item>
          <text:p text:style-name="P15"><text:span text:style-name="T6">Band-level bars: </text:span><text:span text:style-name="T5">real-time amplitude of each vocoder band, drawn as vertical bars. The height represents the envelope value for that band normalised and clamped to the display height. The sand-coloured cap at the top of each bar marks the peak.</text:span></text:p>
        </text:list-item>
        <text:list-item>
          <text:p text:style-name="P15"><text:span text:style-name="T6">Bandwidth curve mode (BANDWIDTH button): </text:span><text:span text:style-name="T5">the per-band filter width setting. The vertical position of each dot controls the Q factor of that band’s filter pair. High position = wide band (low Q, blending into neighbours). Low position = narrow band (high Q, more precise but quieter).</text:span></text:p>
        </text:list-item>
        <text:list-item>
          <text:p text:style-name="P15"><text:span text:style-name="T6">Band Volume curve mode (BAND VOL button): </text:span><text:span text:style-name="T5">a per-band output level multiplier in the range 0.0–1.2×. The curve is painted as a bright line; a dashed reference line marks the 1.0× (unity) level. Dragging the curve down silences individual bands; dragging it above the dashed line boosts them up to 1.2×.</text:span></text:p>
        </text:list-item>
      </text:list>
      <text:p text:style-name="P16"/>
      <text:h text:style-name="P20" text:outline-level="3" loext:marker-style-name="T21"><text:span text:style-name="T21">Editing the Bandwidth Curve</text:span><text:span text:style-name="T21"/></text:h>
      <text:p text:style-name="P6" loext:marker-style-name="T12"><text:span text:style-name="T5">Click anywhere in the display to set the bandwidth of the band under the cursor. Drag horizontally to paint a curve across multiple bands. The cursor changes to a crosshair when hovering over the display. </text:span><text:span text:style-name="T22">T</text:span><text:span text:style-name="T5">he bandwidth curve is saved with the preset. It survives changing the band count: existing values are kept and new bands (when increasing count) are interpolated.</text:span></text:p>
      <text:p text:style-name="P16"/>
      <text:h text:style-name="P20" text:outline-level="3" loext:marker-style-name="T21"><text:span text:style-name="T21">Editing the Band Volume Curve</text:span><text:span text:style-name="T21"/></text:h>
      <text:p text:style-name="P6" loext:marker-style-name="T12"><text:span text:style-name="T5">Click the </text:span><text:span text:style-name="T6">BANDWIDTH</text:span><text:span text:style-name="T5"> button in the top-left corner of the display to switch to </text:span><text:span text:style-name="T6">BAND VOL</text:span><text:span text:style-name="T5"> mode. Click again to return to bandwidth editing. In Band Vol mode, click or drag anywhere in the display to draw a per-band output level multiplier. The top of the display represents 1.2× (maximum boost); the bottom represents 0.0× (full mute). The dashed horizontal line marks 1.0× (unity, no change).</text:span></text:p>
      <text:p text:style-name="P6" loext:marker-style-name="T12"><text:span text:style-name="T5">The Band Volume curve multiplier is applied in the synthesis stage, after envelope following, so it acts as a spectral gain shaper on the vocoded output rather than on the analysis path. Muting a band with the Band Volume curve removes it from the output entirely; its envelope follower still tracks the modulator, so restoring the level brings the band back in immediately at the correct gain.</text:span><text:span text:style-name="T12"/></text:p>
      <text:p text:style-name="P21" loext:marker-style-name="T12">The Band Volume curve is saved with the preset alongside the Bandwidth curve and all knob values. The editing mode (BANDWIDTH or BAND VOL) is also remembered across sessions.</text:p>
      <text:p text:style-name="P22" loext:marker-style-name="T12"/>
      <text:p text:style-name="P22" loext:marker-style-name="T12"/>
      <text:p text:style-name="P22" loext:marker-style-name="T12"><text:soft-page-break/></text:p>
      <text:p text:style-name="P22" loext:marker-style-name="T12"/>
      <text:p text:style-name="P22" loext:marker-style-name="T12"/>
      <text:p text:style-name="P19"/>
      <text:h text:style-name="P5" text:outline-level="1" loext:marker-style-name="T4"><text:span text:style-name="T4">4. Presets and State</text:span><text:span text:style-name="T4"/></text:h>
      <text:p text:style-name="P6" loext:marker-style-name="T12"><text:span text:style-name="T5">VOCODE uses the standard JUCE AudioProcessorValueTreeState mechanism. All knob values, the full 256-point bandwidth curve, and the full 256-point band volume curve are saved and restored by the host as part of the plug-in state. The bandwidth curve is stored under the XML key </text:span><text:span text:style-name="T6">BandwidthCurve</text:span><text:span text:style-name="T5"> and the band volume curve under </text:span><text:span text:style-name="T6">BandVolumeCurve</text:span><text:span text:style-name="T5">, both as child elements of the XML state tree. Presets that pre-date the Band Volume feature load with all band volumes at 1.0× (unity).</text:span></text:p>
      <text:h text:style-name="P5" text:outline-level="1" loext:marker-style-name="T4"><text:span text:style-name="T4">5. CPU Usage Guide</text:span><text:span text:style-name="T4"/></text:h>
      <text:p text:style-name="P6" loext:marker-style-name="T12"><text:span text:style-name="T5">The processing cost of VOCODE scales with:</text:span><text:span text:style-name="T12"/></text:p>
      <text:list text:continue-numbering="true" text:style-name="WWNum2">
        <text:list-item>
          <text:p text:style-name="P15"><text:span text:style-name="T6">BANDS × BAND ORDER: </text:span><text:span text:style-name="T5">each band runs 1–4 biquad filters on both modulator and carrier channels per sample. 256 bands at order 4 = 3072 multiply-accumulate operations per sample per channel.</text:span></text:p>
        </text:list-item>
        <text:list-item>
          <text:p text:style-name="P15"><text:span text:style-name="T6">Sample rate: </text:span><text:span text:style-name="T5">higher sample rates proportionally increase cost because more samples are processed per second.</text:span></text:p>
        </text:list-item>
        <text:list-item>
          <text:p text:style-name="P15"><text:span text:style-name="T6">Buffer size: </text:span><text:span text:style-name="T5">the filter-rebuild triggered by a band-count change happens once per block and is not sample-accurate, but it is fast and should not cause glitches except at very small buffer sizes (&lt; 32 samples).</text:span></text:p>
        </text:list-item>
      </text:list>
      <text:p text:style-name="P16"/>
      <text:p text:style-name="P6" loext:marker-style-name="T12"><text:span text:style-name="T5">Approximate CPU cost on a modern desktop CPU at 44.1 kHz / 512-sample buffer:</text:span><text:span text:style-name="T12"/></text:p>
      <text:p text:style-name="P16"/>
      <table:table table:name="Table2" table:style-name="Table2">
        <table:table-column table:style-name="Table2.A" table:number-columns-repeated="4"/>
        <table:table-header-rows>
          <table:table-row table:style-name="Table2.1">
            <table:table-cell table:style-name="Table2.A1" office:value-type="string">
              <text:p text:style-name="Standard" loext:marker-style-name="T16"><text:span text:style-name="T17">BANDS</text:span><text:span text:style-name="T16"/></text:p>
            </table:table-cell>
            <table:table-cell table:style-name="Table2.A1" office:value-type="string">
              <text:p text:style-name="Standard" loext:marker-style-name="T16"><text:span text:style-name="T17">ORDER 1</text:span><text:span text:style-name="T16"/></text:p>
            </table:table-cell>
            <table:table-cell table:style-name="Table2.A1" office:value-type="string">
              <text:p text:style-name="Standard" loext:marker-style-name="T16"><text:span text:style-name="T17">ORDER 2</text:span><text:span text:style-name="T16"/></text:p>
            </table:table-cell>
            <table:table-cell table:style-name="Table2.A1" office:value-type="string">
              <text:p text:style-name="Standard" loext:marker-style-name="T16"><text:span text:style-name="T17">ORDER 4</text:span><text:span text:style-name="T16"/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 loext:marker-style-name="T19"><text:span text:style-name="T20">16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&lt; 1%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&lt; 1%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&lt; 1%</text:span><text:span text:style-name="T19"/></text:p>
          </table:table-cell>
        </table:table-row>
        <table:table-row table:style-name="Table2.1">
          <table:table-cell table:style-name="Table2.A3" office:value-type="string">
            <text:p text:style-name="Standard" loext:marker-style-name="T19"><text:span text:style-name="T20">64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1%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2%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4%</text:span><text:span text:style-name="T19"/></text:p>
          </table:table-cell>
        </table:table-row>
        <table:table-row table:style-name="Table2.1">
          <table:table-cell table:style-name="Table2.A2" office:value-type="string">
            <text:p text:style-name="Standard" loext:marker-style-name="T19"><text:span text:style-name="T20">128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~2%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~4%</text:span><text:span text:style-name="T19"/></text:p>
          </table:table-cell>
          <table:table-cell table:style-name="Table2.A2" office:value-type="string">
            <text:p text:style-name="Standard" loext:marker-style-name="T19"><text:span text:style-name="T20">~8%</text:span><text:span text:style-name="T19"/></text:p>
          </table:table-cell>
        </table:table-row>
        <table:table-row table:style-name="Table2.1">
          <table:table-cell table:style-name="Table2.A3" office:value-type="string">
            <text:p text:style-name="Standard" loext:marker-style-name="T19"><text:span text:style-name="T20">256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4%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8%</text:span><text:span text:style-name="T19"/></text:p>
          </table:table-cell>
          <table:table-cell table:style-name="Table2.A3" office:value-type="string">
            <text:p text:style-name="Standard" loext:marker-style-name="T19"><text:span text:style-name="T20">~16%</text:span><text:span text:style-name="T19"/></text:p>
          </table:table-cell>
        </table:table-row>
      </table:table>
      <text:p text:style-name="P23" loext:marker-style-name="T23"/>
      <text:p text:style-name="P23" loext:marker-style-name="T23"/>
      <text:h text:style-name="P5" text:outline-level="1" loext:marker-style-name="T4"><text:span text:style-name="T4">6. Tips and Techniques</text:span><text:span text:style-name="T4"/></text:h>
      <text:p text:style-name="P16"/>
      <text:h text:style-name="P13" text:outline-level="2" loext:marker-style-name="T10"><text:span text:style-name="T10">Bandwidth Curve Shapes</text:span><text:span text:style-name="T10"/></text:h>
      <text:p text:style-name="P6" loext:marker-style-name="T12"><text:span text:style-name="T5">The bandwidth curve is essentially a per-band equaliser for the filter Q. Some useful shapes:</text:span><text:span text:style-name="T12"/></text:p>
      <text:list text:continue-numbering="true" text:style-name="WWNum2">
        <text:list-item>
          <text:p text:style-name="P15"><text:span text:style-name="T6">Flat (mid): </text:span><text:span text:style-name="T5">neutral starting point. All bands equally wide.</text:span></text:p>
        </text:list-item>
        <text:list-item>
          <text:p text:style-name="P15"><text:span text:style-name="T6">Ramp low-to-high: </text:span><text:span text:style-name="T5">wide low bands, narrow high bands. Keeps bass warmth while sharpening high-frequency detail.</text:span></text:p>
        </text:list-item>
        <text:list-item>
          <text:p text:style-name="P15"><text:soft-page-break/><text:span text:style-name="T6">Inverted arch: </text:span><text:span text:style-name="T5">narrow at extremes, wide in the middle. Useful for reducing low-end mud and top-end hiss simultaneously.</text:span></text:p>
        </text:list-item>
        <text:list-item>
          <text:p text:style-name="P15"><text:span text:style-name="T6">Random jagged: </text:span><text:span text:style-name="T5">paint an irregular curve. Creates a comb-like frequency response character - experimental and interesting with synthesised sources.</text:span></text:p>
        </text:list-item>
      </text:list>
      <text:p text:style-name="P16"/>
      <text:h text:style-name="P13" text:outline-level="2" loext:marker-style-name="T10"><text:span text:style-name="T10">Band Volume Curve Techniques</text:span><text:span text:style-name="T10"/></text:h>
      <text:p text:style-name="P6" loext:marker-style-name="T12"><text:span text:style-name="T5">The Band Volume curve acts as a spectral gain shaper on the vocoded output. Because it is independent of the Bandwidth curve, both can be sculpted simultaneously. Some useful approaches:</text:span><text:span text:style-name="T12"/></text:p>
      <text:list text:continue-numbering="true" text:style-name="WWNum2">
        <text:list-item>
          <text:p text:style-name="P15"><text:span text:style-name="T6">Spectral EQ: </text:span><text:span text:style-name="T5">draw a smooth low-shelf or high-shelf to roll off muddy low-mids or tame harsh highs without touching the bandwidth settings.</text:span></text:p>
        </text:list-item>
        <text:list-item>
          <text:p text:style-name="P15"><text:span text:style-name="T6">Band muting: </text:span><text:span text:style-name="T5">drag isolated frequency regions to 0.0× to remove specific problem frequencies (e.g. a resonant room mode or a sibilant peak) from the vocoded output entirely.</text:span></text:p>
        </text:list-item>
        <text:list-item>
          <text:p text:style-name="P15"><text:span text:style-name="T6">Harmonic boost: </text:span><text:span text:style-name="T5">raise the curve to 1.2× at known harmonic frequencies of the carrier to emphasise the tonal character of the source.</text:span></text:p>
        </text:list-item>
        <text:list-item>
          <text:p text:style-name="P15"><text:span text:style-name="T6">Combined sculpting: </text:span><text:span text:style-name="T5">use narrow Bandwidth for precise analysis, then compensate for the resulting quiet bands by boosting those same bands in the Band Volume curve - fine spectral detail without the usual level penalty of high-Q filters.</text:span></text:p>
        </text:list-item>
      </text:list>
      <text:p text:style-name="P19"/>
      <text:h text:style-name="P5" text:outline-level="1" loext:marker-style-name="T4"><text:span text:style-name="T4">7. Technical Reference</text:span><text:span text:style-name="T4"/></text:h>
      <text:h text:style-name="P13" text:outline-level="2" loext:marker-style-name="T10"><text:span text:style-name="T10">Filter Design</text:span><text:span text:style-name="T10"/></text:h>
      <text:p text:style-name="P6"><text:span text:style-name="T5">Each band uses a </text:span><text:span text:style-name="T6">transposed direct-form II biquad band-pass filter</text:span><text:span text:style-name="T5">. The band-pass topology is derived from the Audio EQ Cookbook formula. Q is computed once per block as:</text:span></text:p>
      <text:p text:style-name="P16"/>
      <text:p text:style-name="P24" loext:marker-style-name="T24"><text:span text:style-name="T24">baseQ = max(1, numBands × 0.35) <text:s text:c="3"/>globalQ = baseQ × 2</text:span><text:span text:style-name="T24"/></text:p>
      <text:p text:style-name="P25" loext:marker-style-name="T24"><text:span text:style-name="T24">perBandQ = globalQ × qMult(bandwidthCurve[b])</text:span><text:span text:style-name="T24"/></text:p>
      <text:p text:style-name="P6"><text:span text:style-name="T5">where </text:span><text:span text:style-name="T24">qMult</text:span><text:span text:style-name="T5"> maps the bandwidth curve position [0, 1] to a Q multiplier [2.0, 0.5] - high curve position = lower Q = wider band, low position = higher Q = narrower band.</text:span></text:p>
      <text:p text:style-name="P16"/>
      <text:h text:style-name="P13" text:outline-level="2" loext:marker-style-name="T10"><text:span text:style-name="T10">Envelope Follower</text:span><text:span text:style-name="T10"/></text:h>
      <text:p text:style-name="P6" loext:marker-style-name="T12"><text:span text:style-name="T5">Each band has an independent first-order peak follower using an asymmetric AR model:</text:span><text:span text:style-name="T12"/></text:p>
      <text:p text:style-name="P16"/>
      <text:p text:style-name="P26" loext:marker-style-name="T24"><text:span text:style-name="T24">env = (|x| &gt; env) ? att*env + (1-att)*|x| : rel*env + (1-rel)*|x|</text:span><text:span text:style-name="T24"/></text:p>
      <text:p text:style-name="P6"><text:span text:style-name="T5">Attack and release coefficients are computed as </text:span><text:span text:style-name="T24">exp(-1 / (ms × sr))</text:span><text:span text:style-name="T5"> where </text:span><text:span text:style-name="T24">sr</text:span><text:span text:style-name="T5"> is the sample rate. This gives time-constant behaviour independent of sample rate.</text:span></text:p>
      <text:p text:style-name="P16"/>
      <text:h text:style-name="P13" text:outline-level="2" loext:marker-style-name="T10"><text:span text:style-name="T10">Level Compensation</text:span><text:span text:style-name="T10"/></text:h>
      <text:p text:style-name="P6" loext:marker-style-name="T12"><text:span text:style-name="T5">Without compensation, narrower bands (higher Q) carry less energy, and adding more biquad stages further reduces passband level. Three factors are pre-multiplied per band to maintain consistent loudness across different settings:</text:span><text:span text:style-name="T12"/></text:p>
      <text:list text:continue-numbering="true" text:style-name="WWNum2">
        <text:list-item>
          <text:p text:style-name="P15"><text:soft-page-break/><text:span text:style-name="T6">sqrt(qMult): </text:span><text:span text:style-name="T5">compensates for the √(BW) energy reduction of narrower Q values.</text:span></text:p>
        </text:list-item>
        <text:list-item>
          <text:p text:style-name="P15"><text:span text:style-name="T6">sqrt(bandOrder): </text:span><text:span text:style-name="T5">compensates for passband narrowing when cascading multiple stages.</text:span></text:p>
        </text:list-item>
        <text:list-item>
          <text:p text:style-name="P15"><text:span text:style-name="T6">Spectral tilt (fc / 1kHz)^0.30: </text:span><text:span text:style-name="T5">compensates for the natural ≥6 dB/octave energy roll-off in music and speech. Low bands are attenuated, high bands boosted, so the vocoded output has a balanced spectral weight.</text:span></text:p>
        </text:list-item>
      </text:list>
      <text:p text:style-name="P16"/>
      <text:h text:style-name="P13" text:outline-level="2" loext:marker-style-name="T10"><text:span text:style-name="T10">Band Frequency Spacing</text:span><text:span text:style-name="T10"/></text:h>
      <text:p text:style-name="P6"><text:span text:style-name="T5">Bands are spaced </text:span><text:span text:style-name="T6">logarithmically</text:span><text:span text:style-name="T5"> between 80 Hz and 12 kHz:</text:span></text:p>
      <text:p text:style-name="P16"/>
      <text:p text:style-name="P26" loext:marker-style-name="T24"><text:span text:style-name="T24">fc[b] = 80 × exp(log(12000/80) × b/(N-1))</text:span><text:span text:style-name="T24"/></text:p>
      <text:p text:style-name="P6" loext:marker-style-name="T12"><text:span text:style-name="T5">This mirrors the logarithmic frequency resolution of the human auditory system, so each band covers a perceptually equal slice of the spectrum.</text:span><text:span text:style-name="T12"/></text:p>
      <text:p text:style-name="P19"/>
      <text:h text:style-name="P5" text:outline-level="1" loext:marker-style-name="T4"><text:span text:style-name="T4">9. Credits and License</text:span><text:span text:style-name="T4"/></text:h>
      <text:p text:style-name="P6" loext:marker-style-name="T12"><text:span text:style-name="T5">VOCODE is built with the JUCE framework (</text:span><text:a xlink:type="simple" xlink:href="https://juce.com/" text:style-name="Internet_20_link" text:visited-style-name="Visited_20_Internet_20_Link"><text:span text:style-name="Internet_20_link"><text:span text:style-name="T5">https://juce.com</text:span></text:span></text:a><text:span text:style-name="T5">) with the help of Claude.ai by Anthropic.</text:span></text:p>
      <text:p text:style-name="P6" loext:marker-style-name="T12"><text:span text:style-name="T5">The biquad coefficient formulas follow the Audio EQ Cookbook by Robert Bristow-Johnson, which is in the public domain.</text:span><text:span text:style-name="T12"/></text:p>
      <text:p text:style-name="P6"><text:span text:style-name="T5">This manual and all accompanying source code are provided </text:span><text:span text:style-name="T13">"as is"</text:span><text:span text:style-name="T5"> without warranty of any kin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1208" loext:opacity="100%" style:font-name="Arial1" fo:font-size="11pt" fo:language="en" fo:country="GB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a1208" loext:opacity="100%" style:font-name="Arial1" fo:font-size="11pt" fo:language="en" fo:country="GB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simple" style:writing-mode="lr-tb"/>
      <style:text-properties fo:color="#1a1208" loext:opacity="100%" style:font-name="Arial1" fo:font-family="Arial" style:font-family-generic="swiss" style:font-pitch="variable" fo:font-size="11pt" fo:language="en" fo:country="GB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3e1e07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b5601c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82cm" fo:margin-bottom="0.106cm" style:contextual-spacing="false"/>
      <style:text-properties fo:color="#3e1e07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208" loext:opacity="100%" style:font-name="Arial1" fo:font-family="Arial" style:font-family-generic="swiss" style:font-pitch="variable" fo:font-size="11pt" fo:language="en" fo:country="GB" fo:font-weight="bold" style:letter-kerning="false" style:font-name-asian="Arial2" style:font-family-asian="Arial" style:font-family-generic-asian="system" style:font-pitch-asian="variable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208" loext:opacity="100%" style:font-name="Arial1" fo:font-family="Arial" style:font-family-generic="swiss" style:font-pitch="variable" fo:font-size="11pt" fo:language="en" fo:country="GB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b5601c" loext:opacity="100%"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color="#6b4a25" loext:opacity="100%" style:font-name-complex="OpenSymbol" style:font-family-complex="Open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b5601c" loext:opacity="100%"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color="#6b4a25" loext:opacity="100%" style:font-name-complex="OpenSymbol" style:font-family-complex="Open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1a1208" loext:opacity="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1.05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529cm" fo:margin-left="1.693cm"/>
        </style:list-level-properties>
        <style:text-properties fo:font-family="OpenSymbol" style:font-style-name="Regular" style:font-pitch="variable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1.05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529cm" fo:margin-left="1.693cm"/>
        </style:list-level-properties>
        <style:text-properties fo:font-family="OpenSymbol" style:font-style-name="Regular" style:font-pitch="variable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51pt solid #b5601c">
        <style:tab-stops>
          <style:tab-stop style:position="15.921cm" style:type="right"/>
        </style:tab-stops>
      </style:paragraph-properties>
    </style:style>
    <style:style style:name="MP2" style:family="paragraph" style:parent-style-name="Standard">
      <style:paragraph-properties fo:text-align="left" style:justify-single-word="false" fo:padding-left="0cm" fo:padding-right="0cm" fo:padding-top="0.141cm" fo:padding-bottom="0cm" fo:border-left="none" fo:border-right="none" fo:border-top="0.51pt solid #b5601c" fo:border-bottom="none">
        <style:tab-stops>
          <style:tab-stop style:position="15.921cm" style:type="right"/>
        </style:tab-stops>
      </style:paragraph-properties>
    </style:style>
    <style:style style:name="MT1" style:family="text">
      <style:text-properties fo:color="#6b4a25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2" style:family="text">
      <style:text-properties fo:font-size="9pt" style:font-name-asian="Arial2" style:font-size-asian="9pt" style:font-name-complex="Arial2" style:font-size-complex="9pt"/>
    </style:style>
    <style:style style:name="MT3" style:family="text">
      <style:text-properties fo:color="#6b4a25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MT4" style:family="text">
      <style:text-properties fo:color="#6b4a25" loext:opacity="100%" fo:font-size="9pt" fo:font-style="italic" officeooo:rsid="00215bce" style:font-name-asian="Arial2" style:font-size-asian="9pt" style:font-style-asian="italic" style:font-name-complex="Arial2" style:font-size-complex="9pt" style:font-style-complex="italic"/>
    </style:style>
    <style:style style:name="MT5" style:family="text">
      <style:text-properties fo:color="#6b4a25" loext:opacity="100%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OCODE <text:s/>— <text:s/>User Manual</text:span><text:span text:style-name="MT2"><text:tab/></text:span><text:span text:style-name="MT3">Vocode v1.</text:span><text:span text:style-name="MT4">1</text:span></text:p>
      </style:header>
      <style:footer>
        <text:p text:style-name="MP2"><text:span text:style-name="MT5">© 2026 aquanodemusic – Creative Commons License (Feel Free to share, edit and everything, as long as you give credit.)</text:span><text:span text:style-name="MT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09:00:13</meta:creation-date>
    <meta:initial-creator>Un-named</meta:initial-creator>
    <dc:language>en-US</dc:language>
    <dc:date>2026-05-02T17:59:08.315223800</dc:date>
    <meta:editing-cycles>10</meta:editing-cycles>
    <meta:editing-duration>PT18M45S</meta:editing-duration>
    <meta:generator>LibreOffice/26.2.2.2$Windows_X86_64 LibreOffice_project/1f77d10d6938fd34972958f64b2bcfa54f8b1ba5</meta:generator>
    <meta:document-statistic meta:table-count="2" meta:image-count="0" meta:object-count="0" meta:page-count="6" meta:paragraph-count="137" meta:word-count="1984" meta:character-count="12004" meta:non-whitespace-character-count="10155"/>
    <meta:user-defined meta:name="AppVersion">15.0000</meta:user-defined>
  </office:meta>
</office:document-meta>
</file>