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A2000002EAC542B6F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quatico" svg:font-family="Aquatico" style:font-family-generic="modern" style:font-pitch="variable"/>
    <style:font-face style:name="Bahnschrift" svg:font-family="Bahnschrift"/>
    <style:font-face style:name="Bahnschrift1" svg:font-family="Bahnschrif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quatico" fo:font-size="32pt" officeooo:rsid="000c0540" officeooo:paragraph-rsid="000c0540" style:font-size-asian="32pt" style:font-size-complex="32pt"/>
    </style:style>
    <style:style style:name="P2" style:family="paragraph" style:parent-style-name="Standard">
      <style:text-properties style:font-name="Aquatico" fo:font-size="12pt" officeooo:rsid="000c0540" officeooo:paragraph-rsid="000c0540" style:font-size-asian="10.5pt" style:font-size-complex="12pt"/>
    </style:style>
    <style:style style:name="P3" style:family="paragraph">
      <style:paragraph-properties fo:text-align="center"/>
    </style:style>
    <style:style style:name="P4" style:family="paragraph" style:parent-style-name="Standard">
      <style:text-properties style:font-name="Aquatico" fo:font-size="12pt" officeooo:rsid="0033d260" officeooo:paragraph-rsid="000c0540" style:font-size-asian="10.5pt" style:font-size-complex="12pt"/>
    </style:style>
    <style:style style:name="P5" style:family="paragraph" style:parent-style-name="Standard">
      <style:text-properties style:font-name="Aquatico" fo:font-size="12pt" officeooo:rsid="0033d260" officeooo:paragraph-rsid="0033d260" style:font-size-asian="10.5pt" style:font-size-complex="12pt"/>
    </style:style>
    <style:style style:name="P6" style:family="paragraph" style:parent-style-name="Text_20_body">
      <style:text-properties officeooo:paragraph-rsid="004026ca"/>
    </style:style>
    <style:style style:name="P7" style:family="paragraph" style:parent-style-name="Text_20_body" style:list-style-name="L1">
      <style:text-properties officeooo:paragraph-rsid="005244e4"/>
    </style:style>
    <style:style style:name="P8" style:family="paragraph" style:parent-style-name="Text_20_body" style:list-style-name="L1">
      <style:text-properties fo:color="#999999" loext:opacity="100%" style:font-name="Bahnschrift1" fo:font-size="9pt" officeooo:rsid="0034ecce" officeooo:paragraph-rsid="004026ca" style:font-size-asian="9pt" style:font-size-complex="9pt"/>
    </style:style>
    <style:style style:name="P9" style:family="paragraph" style:parent-style-name="Text_20_body" style:list-style-name="L1">
      <style:text-properties fo:color="#999999" loext:opacity="100%" style:font-name="Bahnschrift1" fo:font-size="9pt" officeooo:rsid="0034ecce" officeooo:paragraph-rsid="0054d7c7" style:font-size-asian="9pt" style:font-size-complex="9pt"/>
    </style:style>
    <style:style style:name="P10" style:family="paragraph" style:parent-style-name="Text_20_body" style:list-style-name="L1">
      <style:text-properties fo:color="#999999" loext:opacity="100%" style:font-name="Bahnschrift1" fo:font-size="9pt" officeooo:rsid="0034ecce" style:font-size-asian="9pt" style:font-size-complex="9pt"/>
    </style:style>
    <style:style style:name="P11" style:family="paragraph" style:parent-style-name="Standard">
      <style:paragraph-properties fo:break-before="page"/>
      <style:text-properties style:font-name="Bahnschrift1" fo:font-size="12pt" officeooo:rsid="000d0e80" officeooo:paragraph-rsid="000d0e80" style:font-size-asian="10.5pt" style:font-size-complex="12pt"/>
    </style:style>
    <style:style style:name="P12" style:family="paragraph" style:parent-style-name="Standard">
      <style:text-properties style:font-name="Bahnschrift1" fo:font-size="12pt" officeooo:rsid="000d0e80" officeooo:paragraph-rsid="000d0e80" style:font-size-asian="10.5pt" style:font-size-complex="12pt"/>
    </style:style>
    <style:style style:name="P13" style:family="paragraph" style:parent-style-name="Standard">
      <style:text-properties style:font-name="Bahnschrift" officeooo:paragraph-rsid="000d0e80"/>
    </style:style>
    <style:style style:name="P14" style:family="paragraph" style:parent-style-name="Standard">
      <style:text-properties style:font-name="Bahnschrift" officeooo:rsid="002d892b" officeooo:paragraph-rsid="002d892b"/>
    </style:style>
    <style:style style:name="P15" style:family="paragraph" style:parent-style-name="Standard">
      <style:text-properties style:font-name="Aquatico" fo:font-size="18pt" style:text-underline-style="solid" style:text-underline-width="auto" style:text-underline-color="font-color" officeooo:rsid="0068e10c" officeooo:paragraph-rsid="0068e10c" style:font-size-asian="18pt" style:font-size-complex="18pt"/>
    </style:style>
    <style:style style:name="P16" style:family="paragraph" style:parent-style-name="Standard">
      <style:text-properties style:font-name="Bahnschrift1" fo:font-style="normal" fo:font-weight="normal" officeooo:rsid="0068e10c" officeooo:paragraph-rsid="0068e10c" style:font-style-asian="normal" style:font-weight-asian="normal" style:font-style-complex="normal" style:font-weight-complex="normal"/>
    </style:style>
    <style:style style:name="P17" style:family="paragraph" style:parent-style-name="Standard">
      <style:text-properties style:font-name="Aquatico" fo:font-size="18pt" style:text-underline-style="solid" style:text-underline-width="auto" style:text-underline-color="font-color" officeooo:rsid="0012032a" officeooo:paragraph-rsid="0012032a" style:font-size-asian="18pt" style:font-size-complex="18pt"/>
    </style:style>
    <style:style style:name="P18" style:family="paragraph" style:parent-style-name="Standard">
      <style:text-properties style:font-name="Bahnschrift1" fo:font-style="italic" officeooo:rsid="00135c29" officeooo:paragraph-rsid="0012032a" style:font-style-asian="italic" style:font-style-complex="italic"/>
    </style:style>
    <style:style style:name="P19" style:family="paragraph" style:parent-style-name="Standard" style:list-style-name="L2">
      <style:text-properties style:font-name="Bahnschrift1" fo:font-style="normal" officeooo:rsid="00679193" officeooo:paragraph-rsid="00679193" style:font-style-asian="normal" style:font-style-complex="normal"/>
    </style:style>
    <style:style style:name="P20" style:family="paragraph" style:parent-style-name="Standard" style:list-style-name="L2">
      <style:text-properties style:font-name="Bahnschrift1" fo:font-style="normal" fo:font-weight="normal" officeooo:rsid="00679193" officeooo:paragraph-rsid="00679193" style:font-style-asian="normal" style:font-weight-asian="normal" style:font-style-complex="normal" style:font-weight-complex="normal"/>
    </style:style>
    <style:style style:name="P21" style:family="paragraph" style:parent-style-name="Standard">
      <style:text-properties style:font-name="Bahnschrift1" fo:font-style="normal" fo:font-weight="normal" officeooo:rsid="00679193" officeooo:paragraph-rsid="00679193" style:font-style-asian="normal" style:font-weight-asian="normal" style:font-style-complex="normal" style:font-weight-complex="normal"/>
    </style:style>
    <style:style style:name="P22" style:family="paragraph" style:parent-style-name="Standard">
      <style:text-properties style:font-name="Bahnschrift1" fo:font-style="normal" officeooo:rsid="005cba2a" officeooo:paragraph-rsid="005cba2a" style:font-style-asian="normal" style:font-style-complex="normal"/>
    </style:style>
    <style:style style:name="P23" style:family="paragraph" style:parent-style-name="Text_20_body">
      <style:text-properties style:font-name="Aquatico" fo:font-size="18pt" style:text-underline-style="solid" style:text-underline-width="auto" style:text-underline-color="font-color" officeooo:rsid="001fcb9b" officeooo:paragraph-rsid="005fc839" style:font-size-asian="18pt" style:font-size-complex="18pt"/>
    </style:style>
    <style:style style:name="P24" style:family="paragraph" style:parent-style-name="Standard">
      <style:text-properties style:font-name="Bahnschrift1" fo:font-size="12pt" style:text-underline-style="none" officeooo:rsid="001fcb9b" officeooo:paragraph-rsid="005fc839" style:font-size-asian="10.5pt" style:font-size-complex="12pt"/>
    </style:style>
    <style:style style:name="P25" style:family="paragraph" style:parent-style-name="Text_20_body">
      <style:text-properties style:font-name="Bahnschrift1" fo:font-size="12pt" officeooo:rsid="0025d022" officeooo:paragraph-rsid="005fc839" style:font-size-asian="12pt" style:font-size-complex="12pt"/>
    </style:style>
    <style:style style:name="P26" style:family="paragraph" style:parent-style-name="Text_20_body" style:list-style-name="L3">
      <style:text-properties style:font-name="Aquatico" officeooo:rsid="0012032a" officeooo:paragraph-rsid="005fc839"/>
    </style:style>
    <style:style style:name="P27" style:family="paragraph" style:parent-style-name="Text_20_body" style:list-style-name="L3">
      <style:text-properties style:font-name="Bahnschrift1" fo:font-size="12pt" officeooo:rsid="0012032a" officeooo:paragraph-rsid="005fc839" style:font-size-asian="12pt" style:font-size-complex="12pt"/>
    </style:style>
    <style:style style:name="P28" style:family="paragraph" style:parent-style-name="Text_20_body" style:list-style-name="L3">
      <style:text-properties style:font-name="Bahnschrift1" fo:font-size="12pt" officeooo:rsid="0023fca2" officeooo:paragraph-rsid="005fc839" style:font-size-asian="12pt" style:font-size-complex="12pt"/>
    </style:style>
    <style:style style:name="P29" style:family="paragraph" style:parent-style-name="Standard">
      <style:text-properties style:font-name="Aquatico" officeooo:rsid="0012032a" officeooo:paragraph-rsid="0012032a"/>
    </style:style>
    <style:style style:name="P30" style:family="paragraph" style:parent-style-name="Standard">
      <style:text-properties style:font-name="Aquatico" fo:font-size="18pt" fo:font-style="normal" style:text-underline-style="solid" style:text-underline-width="auto" style:text-underline-color="font-color" officeooo:rsid="0012032a" officeooo:paragraph-rsid="0012032a" style:font-size-asian="18pt" style:font-style-asian="normal" style:font-size-complex="18pt" style:font-style-complex="normal"/>
    </style:style>
    <style:style style:name="P31" style:family="paragraph" style:parent-style-name="Text_20_body" style:list-style-name="L4">
      <style:text-properties style:font-name="Bahnschrift" officeooo:rsid="00679193" officeooo:paragraph-rsid="00679193"/>
    </style:style>
    <style:style style:name="P32" style:family="paragraph" style:parent-style-name="Text_20_body" style:list-style-name="L4">
      <style:text-properties style:font-name="Bahnschrift" officeooo:rsid="00679193" officeooo:paragraph-rsid="006b3046"/>
    </style:style>
    <style:style style:name="P33" style:family="paragraph" style:parent-style-name="Text_20_body">
      <style:text-properties style:font-name="Bahnschrift" officeooo:rsid="0012032a"/>
    </style:style>
    <style:style style:name="P34" style:family="paragraph" style:parent-style-name="Text_20_body">
      <style:text-properties fo:color="#2a9cec" loext:opacity="100%" style:font-name="Bahnschrift1" fo:font-size="9pt" officeooo:rsid="002b4df7" officeooo:paragraph-rsid="002b4df7" style:font-size-asian="9pt" style:font-size-complex="9pt"/>
    </style:style>
    <style:style style:name="P35" style:family="paragraph" style:parent-style-name="Text_20_body">
      <style:text-properties fo:color="#2a9cec" loext:opacity="100%" style:font-name="Bahnschrift1" officeooo:rsid="002971c9" officeooo:paragraph-rsid="002971c9"/>
    </style:style>
    <style:style style:name="T1" style:family="text">
      <style:text-properties officeooo:rsid="00679193"/>
    </style:style>
    <style:style style:name="T2" style:family="text">
      <style:text-properties fo:color="#2a9cec" loext:opacity="100%" fo:font-size="26pt" style:font-size-asian="26pt" style:font-size-complex="26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9pt" fo:font-style="italic" fo:font-weight="bold" officeooo:rsid="00643adb" style:font-size-asian="9pt" style:font-style-asian="italic" style:font-weight-asian="bold" style:font-size-complex="9pt" style:font-style-complex="italic" style:font-weight-complex="bold"/>
    </style:style>
    <style:style style:name="T5" style:family="text">
      <style:text-properties fo:font-size="9pt" style:font-size-asian="9pt" style:font-size-complex="9pt"/>
    </style:style>
    <style:style style:name="T6" style:family="text">
      <style:text-properties fo:color="#2a9cec" loext:opacity="100%" fo:font-family="'Conthrax Sb'" style:font-family-generic="swiss" style:font-pitch="variable"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color="#2a9cec" loext:opacity="100%" fo:font-family="'Conthrax Sb'" style:font-family-generic="swiss" style:font-pitch="variable" fo:font-size="12pt" fo:font-style="normal" fo:font-weight="normal" officeooo:rsid="0032f932" style:font-size-asian="10.5pt" style:font-style-asian="normal" style:font-weight-asian="normal" style:font-size-complex="12pt" style:font-style-complex="normal" style:font-weight-complex="normal"/>
    </style:style>
    <style:style style:name="T8" style:family="text">
      <style:text-properties fo:color="#999999" loext:opacity="100%" style:font-name="Bahnschrift1" fo:font-size="9pt" fo:font-weight="bold" officeooo:rsid="0034ecce" style:font-size-asian="9pt" style:font-size-complex="9pt"/>
    </style:style>
    <style:style style:name="T9" style:family="text">
      <style:text-properties fo:color="#999999" loext:opacity="100%" style:font-name="Bahnschrift1" fo:font-size="9pt" fo:font-weight="bold" officeooo:rsid="003a56ce" style:font-size-asian="9pt" style:font-size-complex="9pt"/>
    </style:style>
    <style:style style:name="T10" style:family="text">
      <style:text-properties fo:color="#999999" loext:opacity="100%" style:font-name="Bahnschrift1" fo:font-size="9pt" officeooo:rsid="0034ecce" style:font-size-asian="9pt" style:font-size-complex="9pt"/>
    </style:style>
    <style:style style:name="T11" style:family="text">
      <style:text-properties fo:color="#999999" loext:opacity="100%" style:font-name="Bahnschrift1" fo:font-size="9pt" officeooo:rsid="003a56ce" style:font-size-asian="9pt" style:font-size-complex="9pt"/>
    </style:style>
    <style:style style:name="T12" style:family="text">
      <style:text-properties fo:color="#999999" loext:opacity="100%" style:font-name="Bahnschrift1" fo:font-size="9pt" officeooo:rsid="0054d7c7" style:font-size-asian="9pt" style:font-size-complex="9pt"/>
    </style:style>
    <style:style style:name="T13" style:family="text">
      <style:text-properties fo:color="#999999" loext:opacity="100%" style:font-name="Bahnschrift1" fo:font-size="9pt" officeooo:rsid="0070962d" style:font-size-asian="9pt" style:font-size-complex="9pt"/>
    </style:style>
    <style:style style:name="T14" style:family="text">
      <style:text-properties fo:color="#999999" loext:opacity="100%" style:font-name="Bahnschrift1" fo:font-size="9pt" officeooo:rsid="0061e8ce" style:font-size-asian="9pt" style:font-size-complex="9pt"/>
    </style:style>
    <style:style style:name="T15" style:family="text">
      <style:text-properties fo:color="#999999" loext:opacity="100%" style:font-name="Bahnschrift1" fo:font-size="9pt" fo:font-weight="bold" officeooo:rsid="005244e4" style:font-size-asian="9pt" style:font-size-complex="9pt"/>
    </style:style>
    <style:style style:name="T16" style:family="text">
      <style:text-properties fo:color="#999999" loext:opacity="100%" style:font-name="Bahnschrift1" fo:font-size="9pt" fo:font-weight="normal" officeooo:rsid="005244e4" style:font-size-asian="9pt" style:font-weight-asian="normal" style:font-size-complex="9pt" style:font-weight-complex="normal"/>
    </style:style>
    <style:style style:name="T17" style:family="text">
      <style:text-properties fo:color="#999999" loext:opacity="100%" style:font-name="Bahnschrift1" fo:font-size="9pt" fo:font-weight="normal" officeooo:rsid="0070962d" style:font-size-asian="9pt" style:font-weight-asian="normal" style:font-size-complex="9pt" style:font-weight-complex="normal"/>
    </style:style>
    <style:style style:name="T18" style:family="text">
      <style:text-properties fo:color="#999999" loext:opacity="100%" style:font-name="Bahnschrift1" fo:font-size="9pt" fo:font-weight="normal" officeooo:rsid="0052dfc7" style:font-size-asian="9pt" style:font-weight-asian="normal" style:font-size-complex="9pt" style:font-weight-complex="normal"/>
    </style:style>
    <style:style style:name="T19" style:family="text">
      <style:text-properties fo:color="#999999" loext:opacity="100%" style:font-name="Bahnschrift1" fo:font-size="9pt" fo:font-weight="bold" officeooo:rsid="0070962d" style:font-size-asian="9pt" style:font-weight-asian="bold" style:font-size-complex="9pt" style:font-weight-complex="bold"/>
    </style:style>
    <style:style style:name="T20" style:family="text">
      <style:text-properties fo:font-weight="bold"/>
    </style:style>
    <style:style style:name="T21" style:family="text">
      <style:text-properties fo:font-weight="normal" officeooo:rsid="0052dfc7" style:font-weight-asian="normal" style:font-weight-complex="normal"/>
    </style:style>
    <style:style style:name="T22" style:family="text">
      <style:text-properties fo:font-weight="normal" officeooo:rsid="005a5231" style:font-weight-asian="normal" style:font-weight-complex="normal"/>
    </style:style>
    <style:style style:name="T23" style:family="text">
      <style:text-properties fo:font-weight="normal" officeooo:rsid="0054d7c7"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normal" officeooo:rsid="005244e4" style:font-weight-asian="normal" style:font-weight-complex="normal"/>
    </style:style>
    <style:style style:name="T27" style:family="text">
      <style:text-properties fo:font-weight="normal" officeooo:rsid="0070962d" style:font-weight-asian="normal" style:font-weight-complex="normal"/>
    </style:style>
    <style:style style:name="T28" style:family="text">
      <style:text-properties fo:font-weight="normal" officeooo:rsid="003c43a8" style:font-weight-asian="normal" style:font-weight-complex="normal"/>
    </style:style>
    <style:style style:name="T29" style:family="text">
      <style:text-properties officeooo:rsid="005b3e21"/>
    </style:style>
    <style:style style:name="T30" style:family="text">
      <style:text-properties officeooo:rsid="0054d7c7"/>
    </style:style>
    <style:style style:name="T31" style:family="text">
      <style:text-properties officeooo:rsid="007168ad"/>
    </style:style>
    <style:style style:name="T32" style:family="text">
      <style:text-properties officeooo:rsid="0054de3a"/>
    </style:style>
    <style:style style:name="T33" style:family="text">
      <style:text-properties officeooo:rsid="0041aa58"/>
    </style:style>
    <style:style style:name="T34" style:family="text">
      <style:text-properties officeooo:rsid="005b5124"/>
    </style:style>
    <style:style style:name="T35" style:family="text">
      <style:text-properties officeooo:rsid="005c5c35"/>
    </style:style>
    <style:style style:name="T36" style:family="text">
      <style:text-properties officeooo:rsid="000f5226"/>
    </style:style>
    <style:style style:name="T37" style:family="text">
      <style:text-properties officeooo:rsid="000fcc38"/>
    </style:style>
    <style:style style:name="T38" style:family="text">
      <style:text-properties fo:font-size="12pt" officeooo:rsid="000d0e80" style:font-size-asian="10.5pt" style:font-size-complex="12pt"/>
    </style:style>
    <style:style style:name="T39" style:family="text">
      <style:text-properties fo:font-size="12pt" officeooo:rsid="00679193" style:font-size-asian="10.5pt" style:font-size-complex="12pt"/>
    </style:style>
    <style:style style:name="T40" style:family="text">
      <style:text-properties fo:font-size="12pt" officeooo:rsid="000f5226" style:font-size-asian="10.5pt" style:font-size-complex="12pt"/>
    </style:style>
    <style:style style:name="T41" style:family="text">
      <style:text-properties officeooo:rsid="004dba66"/>
    </style:style>
    <style:style style:name="T42" style:family="text">
      <style:text-properties fo:font-weight="normal" officeooo:rsid="006b3046" style:font-weight-asian="normal" style:font-weight-complex="normal"/>
    </style:style>
    <style:style style:name="T43" style:family="text">
      <style:text-properties fo:font-weight="bold" officeooo:rsid="006b3046" style:font-weight-asian="bold" style:font-weight-complex="bold"/>
    </style:style>
    <style:style style:name="T44" style:family="text">
      <style:text-properties officeooo:rsid="006b3046"/>
    </style:style>
    <style:style style:name="T45" style:family="text">
      <style:text-properties officeooo:rsid="002ed70e"/>
    </style:style>
    <style:style style:name="T46" style:family="text">
      <style:text-properties fo:font-weight="bold" officeooo:rsid="002ed70e" style:font-weight-asian="bold" style:font-weight-complex="bold"/>
    </style:style>
    <style:style style:name="T47" style:family="text">
      <style:text-properties officeooo:rsid="0063d0eb"/>
    </style:style>
    <style:style style:name="T48" style:family="text">
      <style:text-properties style:text-underline-style="none"/>
    </style:style>
    <style:style style:name="T49" style:family="text">
      <style:text-properties officeooo:rsid="00651afd"/>
    </style:style>
    <style:style style:name="T50" style:family="text">
      <style:text-properties style:font-name="Bahnschrift1" fo:font-size="12pt" fo:font-weight="bold" style:font-size-asian="12pt" style:font-size-complex="12pt"/>
    </style:style>
    <style:style style:name="T51" style:family="text">
      <style:text-properties style:font-name="Bahnschrift1" fo:font-size="12pt" style:font-size-asian="12pt" style:font-size-complex="12pt"/>
    </style:style>
    <style:style style:name="T52" style:family="text">
      <style:text-properties style:font-name="Bahnschrift1" fo:font-size="12pt" officeooo:rsid="00235970" style:font-size-asian="12pt" style:font-size-complex="12pt"/>
    </style:style>
    <style:style style:name="T53" style:family="text">
      <style:text-properties style:font-name="Bahnschrift1" fo:font-size="12pt" officeooo:rsid="002ed70e" style:font-size-asian="12pt" style:font-size-complex="12pt"/>
    </style:style>
    <style:style style:name="T54" style:family="text">
      <style:text-properties officeooo:rsid="00235970"/>
    </style:style>
    <style:style style:name="T55" style:family="text">
      <style:text-properties officeooo:rsid="0068e10c"/>
    </style:style>
    <style:style style:name="T56" style:family="text">
      <style:text-properties officeooo:rsid="0056bda3"/>
    </style:style>
    <style:style style:name="T57" style:family="text">
      <style:text-properties fo:font-size="12pt" style:font-size-asian="12pt" style:font-size-complex="12pt"/>
    </style:style>
    <style:style style:name="T58" style:family="text">
      <style:text-properties style:font-name="Aquatico" fo:font-size="12pt" style:font-size-asian="12pt" style:font-size-complex="12pt"/>
    </style:style>
    <style:style style:name="T59" style:family="text">
      <style:text-properties fo:font-family="'Conthrax Sb'" style:font-family-generic="swiss" style:font-pitch="variable"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Q OCTAVE RESONATOR</text:span> <text:span text:style-name="T2">VST</text:span> </text:p>
      <text:p text:style-name="P1"><text:tab/><text:tab/><text:span text:style-name="T3">Manual </text:span><text:span text:style-name="T4">for Windows</text:span><text:span text:style-name="T5"><text:tab/></text:span><text:span text:style-name="T6">by aquanode </text:span><text:span text:style-name="T7">(2026)</text:span></text:p>
      <text:p text:style-name="P2"><draw:line text:anchor-type="paragraph" draw:z-index="0" draw:name="Line 1" draw:style-name="gr1" draw:text-style-name="P3" svg:x1="-1.11cm" svg:y1="0.344cm" svg:x2="17.326cm" svg:y2="0.345cm"><text:p/></draw:line></text:p>
      <text:p text:style-name="P4"/>
      <text:p text:style-name="P5"><draw:frame draw:style-name="fr1" draw:name="Image1" text:anchor-type="char" svg:width="17cm" svg:height="13.635cm" draw:z-index="1"><draw:image xlink:href="Pictures/10000001000003A2000002EAC542B6F0.png" xlink:type="simple" xlink:show="embed" xlink:actuate="onLoad" draw:mime-type="image/png"/></draw:frame></text:p>
      <text:p text:style-name="P5"/>
      <text:p text:style-name="P6"><text:span text:style-name="T8">Personal / </text:span><text:span text:style-name="T9">Copyright </text:span><text:span text:style-name="T8">Message:</text:span><text:span text:style-name="T10"> <text:tab/></text:span><text:span text:style-name="T11">T</text:span><text:span text:style-name="T10">his plugin is a passion project </text:span><text:span text:style-name="T12">for the community.</text:span><text:span text:style-name="T10"> </text:span><text:span text:style-name="T12">The </text:span><text:span text:style-name="T13">plugin is free and the source <text:tab/><text:tab/><text:tab/><text:tab/>code is open.</text:span><text:span text:style-name="T12"> </text:span><text:span text:style-name="T14">Keeping</text:span><text:span text:style-name="T10"> things simple </text:span><text:span text:style-name="T14">&amp;</text:span><text:span text:style-name="T10"> fair, </text:span><text:span text:style-name="T14">the</text:span><text:span text:style-name="T10"> rules </text:span><text:span text:style-name="T14">are as follows:</text:span></text:p>
      <text:list text:style-name="L1">
        <text:list-header>
          <text:p text:style-name="P7"><text:span text:style-name="T15">Open Source:<text:tab/><text:tab/></text:span><text:span text:style-name="T16">The </text:span><text:span text:style-name="T17">code is free and open source</text:span><text:span text:style-name="T16">. To compile </text:span><text:span text:style-name="T18">from source</text:span><text:span text:style-name="T16">, you need JUCE <text:tab/><text:tab/><text:tab/><text:tab/>and Visual Code. You are welcome to modify the code and use it however you like, <text:tab/><text:tab/><text:tab/></text:span><text:span text:style-name="T17">but do not </text:span><text:span text:style-name="T19">sell </text:span><text:span text:style-name="T17">it for money unaltered (sharing it for free is however encouraged!).</text:span></text:p>
          <text:p text:style-name="P8"><text:span text:style-name="T20">Official Support: <text:tab/><text:tab/></text:span><text:span text:style-name="T21">If you don’t want to compile the plugin </text:span><text:span text:style-name="T22">yourself</text:span><text:span text:style-name="T21">, you can purchase </text:span><text:span text:style-name="T23">it</text:span><text:span text:style-name="T21">. </text:span><text:span text:style-name="T24">The </text:span><text:span text:style-name="T25">only </text:span><text:span text:style-name="T22">official</text:span><text:span text:style-name="T24"><text:tab/><text:tab/><text:tab/>place to purchase th</text:span><text:span text:style-name="T26">e VST3 file directly </text:span><text:span text:style-name="T24">is </text:span><text:a xlink:type="simple" xlink:href="https://aquanode.gumroad.com/" office:target-frame-name="_blank" xlink:show="new" text:style-name="Internet_20_link" text:visited-style-name="Visited_20_Internet_20_Link"><text:span text:style-name="T24">aquanode.gumroad.com</text:span></text:a><text:span text:style-name="T24"> </text:span><text:span text:style-name="T22">for </text:span><text:span text:style-name="T27">a recommen-<text:tab/><text:tab/><text:tab/>ded amount of</text:span><text:span text:style-name="T22"> €3, </text:span><text:span text:style-name="T27">but feel free to type in 0 and get it for free</text:span><text:span text:style-name="T22">. Buying </text:span><text:span text:style-name="T28">t</text:span><text:span text:style-name="T24">here ensures <text:tab/><text:tab/><text:tab/>you have the </text:span><text:span text:style-name="T27">newest, o</text:span><text:span text:style-name="T24">riginal</text:span><text:span text:style-name="T23"> files</text:span><text:span text:style-name="T24"> and </text:span><text:span text:style-name="T28">my </text:span><text:span text:style-name="T26">sincere thank</text:span><text:span text:style-name="T21">s </text:span><text:span text:style-name="T28">for your support. </text:span></text:p>
          <text:p text:style-name="P9"><text:span text:style-name="T20">Sharing is Caring:</text:span> <text:tab/><text:span text:style-name="T29">I don’t track licenses, so you may share the</text:span><text:span text:style-name="T30"> VST with your friends </text:span><text:span text:style-name="T31">or reupload it for <text:tab/><text:tab/><text:tab/>free to download on your website. </text:span>If you see this plugin being <text:span text:style-name="T25">sold</text:span> <text:span text:style-name="T31">for money <text:tab/><text:tab/><text:tab/><text:tab/></text:span>anywhere else, <text:span text:style-name="T31">then </text:span>it’s a scam <text:span text:style-name="T31">so be careful.</text:span></text:p>
          <text:p text:style-name="P10"><text:span text:style-name="T20">No Warranty:</text:span> <text:tab/><text:tab/>I am not <text:span text:style-name="T32">res</text:span><text:span text:style-name="T33">ponsible </text:span>for any damages, <text:span text:style-name="T34">and when you download the plugin </text:span><text:span text:style-name="T35">from a <text:tab/></text:span><text:span text:style-name="T34"><text:tab/><text:tab/>third-</text:span><text:span text:style-name="T35">party website, for </text:span>malware or viruses. Use <text:span text:style-name="T32">such versions</text:span> at your own risk.</text:p>
        </text:list-header>
      </text:list>
      <text:p text:style-name="P11">T<text:span text:style-name="T36">hank you for your interest in my </text:span><text:span text:style-name="T1">2nd</text:span><text:span text:style-name="T36"> VST plugin, which I built with JUCE/</text:span><text:span text:style-name="T37">Visual Code C++.</text:span></text:p>
      <text:p text:style-name="P12"/>
      <text:p text:style-name="P13"><text:span text:style-name="T38">“</text:span><text:span text:style-name="T39">EQ Octave Resonator</text:span><text:span text:style-name="T40">” is </text:span><text:span text:style-name="T39">basically an array of parallel bandpass filters with high peaks tuned to notes to sound musical. The unique feature of this plugin is that you can choose how many resonating octaves and notes should be actively enhancing incoming signals.</text:span></text:p>
      <text:p text:style-name="P13"/>
      <text:p text:style-name="P14">It is a VST equivalent of some earlier <text:span text:style-name="T1">resonator</text:span> effects I created in FL Studio’s Patcher <text:span text:style-name="T41">that are free to download on </text:span><text:a xlink:type="simple" xlink:href="http://aquanode.gumroad.com/" text:style-name="Internet_20_link" text:visited-style-name="Visited_20_Internet_20_Link"><text:span text:style-name="T41">aquanode.gumroad.com</text:span></text:a><text:span text:style-name="T41">.</text:span></text:p>
      <text:p text:style-name="P14"/>
      <text:p text:style-name="P15">IMPORTANT NOTE: LOUDNESS WARNING</text:p>
      <text:p text:style-name="P15"/>
      <text:p text:style-name="P16">A Resonator may produce sharp, loud spikes in volume. When using it regularly in a DAW, such problems should not occur, but if you feed the already wet signal back into the VST it is very likely. Most software prevents this, but in standalone mode (i.e. when you compile the source code for a standalone .exe program) this might happen. </text:p>
      <text:p text:style-name="P16"/>
      <text:p text:style-name="P16">I thus recommend to have a limiter as next effect in your plugin FX chain.</text:p>
      <text:p text:style-name="P13"/>
      <text:p text:style-name="P17">Features</text:p>
      <text:p text:style-name="P18"/>
      <text:list text:style-name="L2">
        <text:list-item>
          <text:p text:style-name="P19">A <text:span text:style-name="T25">graphical representation </text:span><text:span text:style-name="T24">of the bandpass filters is shown on top. There are bands for all active notes and octaves. The higher the Q (peak focus) value is, the more the band looks </text:span><text:span text:style-name="T42">narrow and </text:span><text:span text:style-name="T24">white, otherwise it looks </text:span><text:span text:style-name="T42">wide and</text:span><text:span text:style-name="T24"> blue. </text:span><text:span text:style-name="T42">The louder the octave is chosen, the taller the band. In subtractive (notch) mode, this behaviour is flipped, but please mind that notch filters always carve out frequencies completely so this flipped view is not 100% accurate.</text:span></text:p>
          <text:p text:style-name="P20"/>
        </text:list-item>
        <text:list-item>
          <text:p text:style-name="P20">A <text:span text:style-name="T43">subtractive / n</text:span><text:span text:style-name="T25">otch mode</text:span>: This subtracts the chosen frequencies. <text:span text:style-name="T44">For this to be audible, the Q factor should not exceed a value of 10, whereas 10 would be way too wide for the regular mode. Keep this in mind while switching back and forth between modes to avoid loud volume spikes.</text:span></text:p>
          <text:p text:style-name="P20"/>
        </text:list-item>
        <text:list-item>
          <text:p text:style-name="P20">A <text:span text:style-name="T25">wet only mode</text:span> to hear ONLY the boosted frequencies instead of the boosted frequencies on top of the original signal. <text:span text:style-name="T44">This only works in regular, not subtractive mode.</text:span></text:p>
          <text:p text:style-name="P20"/>
        </text:list-item>
        <text:list-item>
          <text:p text:style-name="P20">The <text:span text:style-name="T25">Octave Selector:</text:span> Here you can choose the octaves where the resonator should work on. For musical, string like tones, you should disable the higher octaves (7 and up). Each octave has its own q <text:span text:style-name="T44">and volume sliders</text:span>, low values correspond to wide bandpasses, high values to narrow sharp peaks.</text:p>
          <text:p text:style-name="P20"/>
        </text:list-item>
        <text:list-item>
          <text:p text:style-name="P20">And finally the <text:span text:style-name="T25">Note Selector</text:span> where you can check which notes across the chosen octaves should be boosted.</text:p>
        </text:list-item>
      </text:list>
      <text:p text:style-name="P21"/>
      <text:p text:style-name="P21"/>
      <text:p text:style-name="P21"/>
      <text:p text:style-name="P21"/>
      <text:p text:style-name="P22"/>
      <text:p text:style-name="P23"><text:soft-page-break/>How to install</text:p>
      <text:p text:style-name="P24"><text:span text:style-name="T45"><text:tab/>Next to the .vst3 and this .pdf, you will find 4 files with endings .h and .cpp in this <text:tab/>folder. These make up the </text:span><text:span text:style-name="T46">complete source code for JUCE</text:span><text:span text:style-name="T45">, so you can compile and <text:tab/>remake the whole effect plugin yourself if you like. </text:span><text:span text:style-name="T47">Otherwise, you don’t need them.</text:span></text:p>
      <text:p text:style-name="P24"/>
      <text:p text:style-name="P25"><text:span text:style-name="T48"><text:tab/>As</text:span> I do not own a Mac, only PC / Windows is supported. The plugin was tested on <text:tab/>Windows 11 22H2, FL Studio 25, Ableton Live 11, <text:span text:style-name="T49">and using Tracktion’s pluginval.</text:span></text:p>
      <text:list text:style-name="L3">
        <text:list-item>
          <text:list>
            <text:list-item>
              <text:p text:style-name="P26"><text:span text:style-name="T50">Download</text:span><text:span text:style-name="T51"> the </text:span><text:span text:style-name="T52">zip file </text:span><text:span text:style-name="T53">and extract it (you did this already).</text:span></text:p>
            </text:list-item>
            <text:list-item>
              <text:p text:style-name="P26"><text:span text:style-name="T50">Copy</text:span><text:span text:style-name="T51"> the .</text:span><text:span text:style-name="T52">vst3</text:span><text:span text:style-name="T51"> file into your system's VST3 folder. Usually, this is: </text:span></text:p>
              <text:list>
                <text:list-header>
                  <text:p text:style-name="P26"><text:span text:style-name="Source_20_Text"><text:span text:style-name="T51">C:\Program Files\Common Files\VST3</text:span></text:span></text:p>
                </text:list-header>
              </text:list>
            </text:list-item>
            <text:list-item>
              <text:p text:style-name="P27"><text:span text:style-name="T20">Rescan</text:span> your DAW’<text:span text:style-name="T54">s plugin library</text:span> (FL Studio, Ableton Live, etc.). The plugin should appear under the "Effects" or "Filter" category.</text:p>
            </text:list-item>
            <text:list-item>
              <text:p text:style-name="P28">Add it to a mixer track, to which sound is routed.</text:p>
            </text:list-item>
          </text:list>
        </text:list-item>
      </text:list>
      <text:p text:style-name="P29"/>
      <text:p text:style-name="P30">explanations of the controls</text:p>
      <text:p text:style-name="P29"/>
      <text:list text:style-name="L4">
        <text:list-item>
          <text:p text:style-name="P31"><text:span text:style-name="T44">Subtractive</text:span> Mode:<text:tab/>If active, frequencies are damped instead of boosted.</text:p>
        </text:list-item>
        <text:list-item>
          <text:p text:style-name="P31">Wet Only:<text:tab/><text:tab/>Only hear the difference in sound the resonators produce, <text:tab/><text:tab/><text:tab/><text:tab/>without the dry signal.</text:p>
        </text:list-item>
        <text:list-item>
          <text:p text:style-name="P31">Note Selector:<text:tab/>Select which notes you want to be affected (A4 = 440Hz).</text:p>
        </text:list-item>
        <text:list-item>
          <text:p text:style-name="P31">Octave Selector<text:tab/></text:p>
          <text:list>
            <text:list-item>
              <text:p text:style-name="P31">1 to 10:<text:tab/><text:tab/>The octave which is actively resonated upon <text:tab/><text:tab/><text:tab/><text:tab/><text:tab/>(<text:span text:style-name="T55">C0 = 16.35 Hz to B9 = 15804.26 Hz).</text:span></text:p>
            </text:list-item>
            <text:list-item>
              <text:p text:style-name="P31">Q:<text:tab/><text:tab/><text:span text:style-name="T55">Low values are wide bandpasses, they may muddy the signal <text:tab/><text:tab/>and can get loud overall, high values are sharp peaks. </text:span><text:span text:style-name="T44">In <text:tab/><text:tab/><text:tab/>subtractive mode this is the opposite.</text:span></text:p>
            </text:list-item>
            <text:list-item>
              <text:p text:style-name="P32">Wet Gain:<text:tab/>Attenuates or strengthens the wet (i.e. processed) sound.</text:p>
              <text:p text:style-name="P31"/>
            </text:list-item>
          </text:list>
        </text:list-item>
      </text:list>
      <text:p text:style-name="P33"/>
      <text:p text:style-name="P34">Many thanks to Google for their Gemini AI that was indispensable for me to grasp how JUCE and C++ programming even works. <text:span text:style-name="T56">It was a real time-saver, as I did not need to become an expert in all the details. The downside to that is of course that I’d still not be able to program a plugin without its help...</text:span></text:p>
      <text:p text:style-name="P35"><text:span text:style-name="T57">Fonts used in this Documentation: </text:span><text:span text:style-name="T58">Aquatico</text:span><text:span text:style-name="T57">, Bahnschrift, </text:span><text:span text:style-name="T59">Conthra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quatico" svg:font-family="Aquatico" style:font-family-generic="modern" style:font-pitch="variable"/>
    <style:font-face style:name="Bahnschrift" svg:font-family="Bahnschrift"/>
    <style:font-face style:name="Bahnschrift1" svg:font-family="Bahnschrif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2T13:52:07.277827600</meta:creation-date>
    <dc:date>2026-02-03T13:30:11.585173600</dc:date>
    <meta:editing-duration>PT1H55M54S</meta:editing-duration>
    <meta:editing-cycles>91</meta:editing-cycles>
    <meta:generator>LibreOffice/25.8.3.2$Windows_X86_64 LibreOffice_project/8ca8d55c161d602844f5428fa4b58097424e324e</meta:generator>
    <meta:print-date>2026-01-22T16:34:12.690564900</meta:print-date>
    <meta:printed-by>PDF files</meta:printed-by>
    <meta:document-statistic meta:table-count="0" meta:image-count="1" meta:object-count="0" meta:page-count="3" meta:paragraph-count="42" meta:word-count="946" meta:character-count="5320" meta:non-whitespace-character-count="4368"/>
  </office:meta>
</office:document-meta>
</file>